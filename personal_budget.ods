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1.002in"/>
    </style:style>
    <style:style style:name="co8" style:family="table-column">
      <style:table-column-properties fo:break-before="auto" style:column-width="2.3126in"/>
    </style:style>
    <style:style style:name="co9" style:family="table-column">
      <style:table-column-properties fo:break-before="auto" style:column-width="1.2335in"/>
    </style:style>
    <style:style style:name="co10" style:family="table-column">
      <style:table-column-properties fo:break-before="auto" style:column-width="1.695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2709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0626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ta1" style:family="table" style:master-page-name="PageStyle_5f_Transactions">
      <style:table-properties table:display="true" style:writing-mode="lr-tb"/>
    </style:style>
    <style:style style:name="ta2" style:family="table" style:master-page-name="PageStyle_5f_Data_20_Collection">
      <style:table-properties table:display="true" style:writing-mode="lr-tb"/>
    </style:style>
    <style:style style:name="ta3" style:family="table" style:master-page-name="PageStyle_5f_Analysis">
      <style:table-properties table:display="true" style:writing-mode="lr-tb"/>
    </style:style>
    <style:style style:name="ta4" style:family="table" style:master-page-name="PageStyle_5f_Data_20_Visualizations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e75b6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2e75b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49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49">
      <style:table-cell-properties fo:background-color="#fce4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52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0" style:family="table-cell" style:parent-style-name="Default" style:data-style-name="N152">
      <style:table-cell-properties fo:background-color="#fce4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1" style:family="table-cell" style:parent-style-name="Default">
      <style:table-cell-properties fo:border-bottom="none" fo:background-color="#2e75b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1f724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c0392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0e4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52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52">
      <style:table-cell-properties fo:background-color="#d0e4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52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52">
      <style:table-cell-properties fo:background-color="#fce4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d6e4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6" style:family="table-cell" style:parent-style-name="Default" style:data-style-name="N152">
      <style:table-cell-properties fo:background-color="#d6e4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53">
      <style:table-cell-properties fo:background-color="#d6e4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53">
      <style:table-cell-properties fo:background-color="#fce4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9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888888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Transaction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1" table:default-cell-style-name="ce10"/>
        <table:table-column table:style-name="co5" table:number-columns-repeated="16379"/>
        <table:table-row table:style-name="ro1">
          <table:table-cell table:style-name="ce1" office:value-type="string" calcext:value-type="string" table:number-columns-spanned="5" table:number-rows-spanned="1">
            <text:p>Personal Budget — Transactions</text:p>
          </table:table-cell>
          <table:covered-table-cell table:number-columns-repeated="4" table:style-name="Default"/>
          <table:table-cell table:style-name="Default" table:number-columns-repeated="1637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mount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1-04" calcext:value-type="date">
            <text:p>2026-01-04</text:p>
          </table:table-cell>
          <table:table-cell table:style-name="ce5" office:value-type="string" calcext:value-type="string">
            <text:p>Freelance Payment - Client A</text:p>
          </table:table-cell>
          <table:table-cell table:style-name="ce5" office:value-type="string" calcext:value-type="string">
            <text:p>Freelance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337.37" calcext:value-type="float">
            <text:p>$337.3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06" calcext:value-type="date">
            <text:p>2026-01-06</text:p>
          </table:table-cell>
          <table:table-cell office:value-type="string" calcext:value-type="string">
            <text:p>Movie Ticket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pense</text:p>
          </table:table-cell>
          <table:table-cell office:value-type="float" office:value="24.27" calcext:value-type="float">
            <text:p>$24.2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11" calcext:value-type="date">
            <text:p>2026-01-11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Dining Out</text:p>
          </table:table-cell>
          <table:table-cell office:value-type="string" calcext:value-type="string">
            <text:p>Expense</text:p>
          </table:table-cell>
          <table:table-cell office:value-type="float" office:value="10.88" calcext:value-type="float">
            <text:p>$10.88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1-15" calcext:value-type="date">
            <text:p>2026-01-15</text:p>
          </table:table-cell>
          <table:table-cell table:style-name="ce5" office:value-type="string" calcext:value-type="string">
            <text:p>Interest Income</text:p>
          </table:table-cell>
          <table:table-cell table:style-name="ce5" office:value-type="string" calcext:value-type="string">
            <text:p>Investments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17.14" calcext:value-type="float">
            <text:p>$17.14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17" calcext:value-type="date">
            <text:p>2026-01-17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</text:p>
          </table:table-cell>
          <table:table-cell office:value-type="float" office:value="15" calcext:value-type="float">
            <text:p>$15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20" calcext:value-type="date">
            <text:p>2026-01-20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$1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22" calcext:value-type="date">
            <text:p>2026-01-22</text:p>
          </table:table-cell>
          <table:table-cell office:value-type="string" calcext:value-type="string">
            <text:p>Whole Foods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Expense</text:p>
          </table:table-cell>
          <table:table-cell office:value-type="float" office:value="111.91" calcext:value-type="float">
            <text:p>$111.91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23" calcext:value-type="date">
            <text:p>2026-01-23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xpense</text:p>
          </table:table-cell>
          <table:table-cell office:value-type="float" office:value="49.99" calcext:value-type="float">
            <text:p>$49.9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28" calcext:value-type="date">
            <text:p>2026-01-28</text:p>
          </table:table-cell>
          <table:table-cell office:value-type="string" calcext:value-type="string">
            <text:p>Movie Ticket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pense</text:p>
          </table:table-cell>
          <table:table-cell office:value-type="float" office:value="13.09" calcext:value-type="float">
            <text:p>$13.0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1-29" calcext:value-type="date">
            <text:p>2026-01-29</text:p>
          </table:table-cell>
          <table:table-cell office:value-type="string" calcext:value-type="string">
            <text:p>Rent Payment</text:p>
          </table:table-cell>
          <table:table-cell office:value-type="string" calcext:value-type="string">
            <text:p>Housing (Rent/Mortgage)</text:p>
          </table:table-cell>
          <table:table-cell office:value-type="string" calcext:value-type="string">
            <text:p>Expense</text:p>
          </table:table-cell>
          <table:table-cell office:value-type="float" office:value="1200" calcext:value-type="float">
            <text:p>$1,20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2-04" calcext:value-type="date">
            <text:p>2026-02-04</text:p>
          </table:table-cell>
          <table:table-cell office:value-type="string" calcext:value-type="string">
            <text:p>Concert Ticket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pense</text:p>
          </table:table-cell>
          <table:table-cell office:value-type="float" office:value="72.3" calcext:value-type="float">
            <text:p>$72.3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2-05" calcext:value-type="date">
            <text:p>2026-02-05</text:p>
          </table:table-cell>
          <table:table-cell office:value-type="string" calcext:value-type="string">
            <text:p>Brokerage Contribution</text:p>
          </table:table-cell>
          <table:table-cell office:value-type="string" calcext:value-type="string">
            <text:p>Savings/Investments</text:p>
          </table:table-cell>
          <table:table-cell office:value-type="string" calcext:value-type="string">
            <text:p>Expense</text:p>
          </table:table-cell>
          <table:table-cell office:value-type="float" office:value="92.75" calcext:value-type="float">
            <text:p>$92.7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2-05" calcext:value-type="date">
            <text:p>2026-02-05</text:p>
          </table:table-cell>
          <table:table-cell office:value-type="string" calcext:value-type="string">
            <text:p>ATM Withdrawal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Expense</text:p>
          </table:table-cell>
          <table:table-cell office:value-type="float" office:value="34.05" calcext:value-type="float">
            <text:p>$34.05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2-07" calcext:value-type="date">
            <text:p>2026-02-07</text:p>
          </table:table-cell>
          <table:table-cell table:style-name="ce5" office:value-type="string" calcext:value-type="string">
            <text:p>Direct Deposit - Employer</text:p>
          </table:table-cell>
          <table:table-cell table:style-name="ce5" office:value-type="string" calcext:value-type="string">
            <text:p>Salary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3200" calcext:value-type="float">
            <text:p>$3,20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2-10" calcext:value-type="date">
            <text:p>2026-02-10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</text:p>
          </table:table-cell>
          <table:table-cell office:value-type="float" office:value="15" calcext:value-type="float">
            <text:p>$15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2-17" calcext:value-type="date">
            <text:p>2026-02-17</text:p>
          </table:table-cell>
          <table:table-cell office:value-type="string" calcext:value-type="string">
            <text:p>Rent Payment</text:p>
          </table:table-cell>
          <table:table-cell office:value-type="string" calcext:value-type="string">
            <text:p>Housing (Rent/Mortgage)</text:p>
          </table:table-cell>
          <table:table-cell office:value-type="string" calcext:value-type="string">
            <text:p>Expense</text:p>
          </table:table-cell>
          <table:table-cell office:value-type="float" office:value="1200" calcext:value-type="float">
            <text:p>$1,20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Brokerage Contribution</text:p>
          </table:table-cell>
          <table:table-cell office:value-type="string" calcext:value-type="string">
            <text:p>Savings/Investments</text:p>
          </table:table-cell>
          <table:table-cell office:value-type="string" calcext:value-type="string">
            <text:p>Expense</text:p>
          </table:table-cell>
          <table:table-cell office:value-type="float" office:value="176.25" calcext:value-type="float">
            <text:p>$176.25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2-26" calcext:value-type="date">
            <text:p>2026-02-26</text:p>
          </table:table-cell>
          <table:table-cell table:style-name="ce5" office:value-type="string" calcext:value-type="string">
            <text:p>Tax Refund</text:p>
          </table:table-cell>
          <table:table-cell table:style-name="ce5" office:value-type="string" calcext:value-type="string">
            <text:p>Other Income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337.62" calcext:value-type="float">
            <text:p>$337.62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2-27" calcext:value-type="date">
            <text:p>2026-02-27</text:p>
          </table:table-cell>
          <table:table-cell table:style-name="ce5" office:value-type="string" calcext:value-type="string">
            <text:p>Freelance Payment - Client A</text:p>
          </table:table-cell>
          <table:table-cell table:style-name="ce5" office:value-type="string" calcext:value-type="string">
            <text:p>Freelance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527.35" calcext:value-type="float">
            <text:p>$527.3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08" calcext:value-type="date">
            <text:p>2026-03-08</text:p>
          </table:table-cell>
          <table:table-cell office:value-type="string" calcext:value-type="string">
            <text:p>Fast Food</text:p>
          </table:table-cell>
          <table:table-cell office:value-type="string" calcext:value-type="string">
            <text:p>Dining Out</text:p>
          </table:table-cell>
          <table:table-cell office:value-type="string" calcext:value-type="string">
            <text:p>Expense</text:p>
          </table:table-cell>
          <table:table-cell office:value-type="float" office:value="9.94" calcext:value-type="float">
            <text:p>$9.94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10" calcext:value-type="date">
            <text:p>2026-03-10</text:p>
          </table:table-cell>
          <table:table-cell office:value-type="string" calcext:value-type="string">
            <text:p>Electric Bill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</text:p>
          </table:table-cell>
          <table:table-cell office:value-type="float" office:value="111.97" calcext:value-type="float">
            <text:p>$111.9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12" calcext:value-type="date">
            <text:p>2026-03-12</text:p>
          </table:table-cell>
          <table:table-cell office:value-type="string" calcext:value-type="string">
            <text:p>Health Insurance Premiu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313.37" calcext:value-type="float">
            <text:p>$313.3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13" calcext:value-type="date">
            <text:p>2026-03-13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xpense</text:p>
          </table:table-cell>
          <table:table-cell office:value-type="float" office:value="99.25" calcext:value-type="float">
            <text:p>$99.2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13" calcext:value-type="date">
            <text:p>2026-03-13</text:p>
          </table:table-cell>
          <table:table-cell office:value-type="string" calcext:value-type="string">
            <text:p>Internet Bill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</text:p>
          </table:table-cell>
          <table:table-cell office:value-type="float" office:value="72.41" calcext:value-type="float">
            <text:p>$72.41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21" calcext:value-type="date">
            <text:p>2026-03-21</text:p>
          </table:table-cell>
          <table:table-cell office:value-type="string" calcext:value-type="string">
            <text:p>Water Bill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</text:p>
          </table:table-cell>
          <table:table-cell office:value-type="float" office:value="42.94" calcext:value-type="float">
            <text:p>$42.94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21" calcext:value-type="date">
            <text:p>2026-03-21</text:p>
          </table:table-cell>
          <table:table-cell office:value-type="string" calcext:value-type="string">
            <text:p>Transfer to Savings</text:p>
          </table:table-cell>
          <table:table-cell office:value-type="string" calcext:value-type="string">
            <text:p>Savings/Investments</text:p>
          </table:table-cell>
          <table:table-cell office:value-type="string" calcext:value-type="string">
            <text:p>Expense</text:p>
          </table:table-cell>
          <table:table-cell office:value-type="float" office:value="272.92" calcext:value-type="float">
            <text:p>$272.92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23" calcext:value-type="date">
            <text:p>2026-03-23</text:p>
          </table:table-cell>
          <table:table-cell office:value-type="string" calcext:value-type="string">
            <text:p>Streaming Service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pense</text:p>
          </table:table-cell>
          <table:table-cell office:value-type="float" office:value="12.78" calcext:value-type="float">
            <text:p>$12.7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3-24" calcext:value-type="date">
            <text:p>2026-03-24</text:p>
          </table:table-cell>
          <table:table-cell office:value-type="string" calcext:value-type="string">
            <text:p>Dentist Visit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Expense</text:p>
          </table:table-cell>
          <table:table-cell office:value-type="float" office:value="141.85" calcext:value-type="float">
            <text:p>$141.8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4-01" calcext:value-type="date">
            <text:p>2026-04-01</text:p>
          </table:table-cell>
          <table:table-cell office:value-type="string" calcext:value-type="string">
            <text:p>Transfer to Savings</text:p>
          </table:table-cell>
          <table:table-cell office:value-type="string" calcext:value-type="string">
            <text:p>Savings/Investments</text:p>
          </table:table-cell>
          <table:table-cell office:value-type="string" calcext:value-type="string">
            <text:p>Expense</text:p>
          </table:table-cell>
          <table:table-cell office:value-type="float" office:value="135.87" calcext:value-type="float">
            <text:p>$135.8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4-08" calcext:value-type="date">
            <text:p>2026-04-08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Expense</text:p>
          </table:table-cell>
          <table:table-cell office:value-type="float" office:value="26.88" calcext:value-type="float">
            <text:p>$26.8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4-15" calcext:value-type="date">
            <text:p>2026-04-15</text:p>
          </table:table-cell>
          <table:table-cell office:value-type="string" calcext:value-type="string">
            <text:p>Streaming Service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pense</text:p>
          </table:table-cell>
          <table:table-cell office:value-type="float" office:value="12.39" calcext:value-type="float">
            <text:p>$12.3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4-15" calcext:value-type="date">
            <text:p>2026-04-15</text:p>
          </table:table-cell>
          <table:table-cell office:value-type="string" calcext:value-type="string">
            <text:p>Streaming Service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pense</text:p>
          </table:table-cell>
          <table:table-cell office:value-type="float" office:value="15.05" calcext:value-type="float">
            <text:p>$15.0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4-18" calcext:value-type="date">
            <text:p>2026-04-18</text:p>
          </table:table-cell>
          <table:table-cell office:value-type="string" calcext:value-type="string">
            <text:p>Movie Ticket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pense</text:p>
          </table:table-cell>
          <table:table-cell office:value-type="float" office:value="18.37" calcext:value-type="float">
            <text:p>$18.3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4-20" calcext:value-type="date">
            <text:p>2026-04-20</text:p>
          </table:table-cell>
          <table:table-cell office:value-type="string" calcext:value-type="string">
            <text:p>Health Insurance Premiu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339.99" calcext:value-type="float">
            <text:p>$339.9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4-21" calcext:value-type="date">
            <text:p>2026-04-21</text:p>
          </table:table-cell>
          <table:table-cell office:value-type="string" calcext:value-type="string">
            <text:p>ATM Withdrawal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Expense</text:p>
          </table:table-cell>
          <table:table-cell office:value-type="float" office:value="24.09" calcext:value-type="float">
            <text:p>$24.09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5-02" calcext:value-type="date">
            <text:p>2026-05-02</text:p>
          </table:table-cell>
          <table:table-cell table:style-name="ce5" office:value-type="string" calcext:value-type="string">
            <text:p>Sold Item Online</text:p>
          </table:table-cell>
          <table:table-cell table:style-name="ce5" office:value-type="string" calcext:value-type="string">
            <text:p>Other Income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82.58" calcext:value-type="float">
            <text:p>$82.5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5-04" calcext:value-type="date">
            <text:p>2026-05-04</text:p>
          </table:table-cell>
          <table:table-cell office:value-type="string" calcext:value-type="string">
            <text:p>Transfer to Savings</text:p>
          </table:table-cell>
          <table:table-cell office:value-type="string" calcext:value-type="string">
            <text:p>Savings/Investments</text:p>
          </table:table-cell>
          <table:table-cell office:value-type="string" calcext:value-type="string">
            <text:p>Expense</text:p>
          </table:table-cell>
          <table:table-cell office:value-type="float" office:value="117.13" calcext:value-type="float">
            <text:p>$117.13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5-06" calcext:value-type="date">
            <text:p>2026-05-06</text:p>
          </table:table-cell>
          <table:table-cell table:style-name="ce5" office:value-type="string" calcext:value-type="string">
            <text:p>Sold Item Online</text:p>
          </table:table-cell>
          <table:table-cell table:style-name="ce5" office:value-type="string" calcext:value-type="string">
            <text:p>Other Income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55.09" calcext:value-type="float">
            <text:p>$55.0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5-08" calcext:value-type="date">
            <text:p>2026-05-08</text:p>
          </table:table-cell>
          <table:table-cell office:value-type="string" calcext:value-type="string">
            <text:p>Electric Bill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</text:p>
          </table:table-cell>
          <table:table-cell office:value-type="float" office:value="86.78" calcext:value-type="float">
            <text:p>$86.7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5-09" calcext:value-type="date">
            <text:p>2026-05-09</text:p>
          </table:table-cell>
          <table:table-cell office:value-type="string" calcext:value-type="string">
            <text:p>Transfer to Savings</text:p>
          </table:table-cell>
          <table:table-cell office:value-type="string" calcext:value-type="string">
            <text:p>Savings/Investments</text:p>
          </table:table-cell>
          <table:table-cell office:value-type="string" calcext:value-type="string">
            <text:p>Expense</text:p>
          </table:table-cell>
          <table:table-cell office:value-type="float" office:value="118.46" calcext:value-type="float">
            <text:p>$118.46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5-15" calcext:value-type="date">
            <text:p>2026-05-15</text:p>
          </table:table-cell>
          <table:table-cell office:value-type="string" calcext:value-type="string">
            <text:p>Gift Purchase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Expense</text:p>
          </table:table-cell>
          <table:table-cell office:value-type="float" office:value="50.46" calcext:value-type="float">
            <text:p>$50.46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5-16" calcext:value-type="date">
            <text:p>2026-05-16</text:p>
          </table:table-cell>
          <table:table-cell table:style-name="ce5" office:value-type="string" calcext:value-type="string">
            <text:p>Direct Deposit - Employer</text:p>
          </table:table-cell>
          <table:table-cell table:style-name="ce5" office:value-type="string" calcext:value-type="string">
            <text:p>Salary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3200" calcext:value-type="float">
            <text:p>$3,20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5-23" calcext:value-type="date">
            <text:p>2026-05-23</text:p>
          </table:table-cell>
          <table:table-cell office:value-type="string" calcext:value-type="string">
            <text:p>Concert Ticket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pense</text:p>
          </table:table-cell>
          <table:table-cell office:value-type="float" office:value="83.14" calcext:value-type="float">
            <text:p>$83.14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5-23" calcext:value-type="date">
            <text:p>2026-05-23</text:p>
          </table:table-cell>
          <table:table-cell office:value-type="string" calcext:value-type="string">
            <text:p>Health Insurance Premiu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266.47" calcext:value-type="float">
            <text:p>$266.4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5-31" calcext:value-type="date">
            <text:p>2026-05-31</text:p>
          </table:table-cell>
          <table:table-cell office:value-type="string" calcext:value-type="string">
            <text:p>Car Insurance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xpense</text:p>
          </table:table-cell>
          <table:table-cell office:value-type="float" office:value="100.13" calcext:value-type="float">
            <text:p>$100.13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6-01" calcext:value-type="date">
            <text:p>2026-06-01</text:p>
          </table:table-cell>
          <table:table-cell office:value-type="string" calcext:value-type="string">
            <text:p>Rent Payment</text:p>
          </table:table-cell>
          <table:table-cell office:value-type="string" calcext:value-type="string">
            <text:p>Housing (Rent/Mortgage)</text:p>
          </table:table-cell>
          <table:table-cell office:value-type="string" calcext:value-type="string">
            <text:p>Expense</text:p>
          </table:table-cell>
          <table:table-cell office:value-type="float" office:value="1200" calcext:value-type="float">
            <text:p>$1,20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6-03" calcext:value-type="date">
            <text:p>2026-06-03</text:p>
          </table:table-cell>
          <table:table-cell office:value-type="string" calcext:value-type="string">
            <text:p>Home Supplies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Expense</text:p>
          </table:table-cell>
          <table:table-cell office:value-type="float" office:value="47.56" calcext:value-type="float">
            <text:p>$47.56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6-10" calcext:value-type="date">
            <text:p>2026-06-10</text:p>
          </table:table-cell>
          <table:table-cell office:value-type="string" calcext:value-type="string">
            <text:p>Parking Fee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xpense</text:p>
          </table:table-cell>
          <table:table-cell office:value-type="float" office:value="6.73" calcext:value-type="float">
            <text:p>$6.73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6-20" calcext:value-type="date">
            <text:p>2026-06-20</text:p>
          </table:table-cell>
          <table:table-cell office:value-type="string" calcext:value-type="string">
            <text:p>Online Apparel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xpense</text:p>
          </table:table-cell>
          <table:table-cell office:value-type="float" office:value="85.17" calcext:value-type="float">
            <text:p>$85.1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6-23" calcext:value-type="date">
            <text:p>2026-06-23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</text:p>
          </table:table-cell>
          <table:table-cell office:value-type="float" office:value="15" calcext:value-type="float">
            <text:p>$15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01" calcext:value-type="date">
            <text:p>2026-07-01</text:p>
          </table:table-cell>
          <table:table-cell office:value-type="string" calcext:value-type="string">
            <text:p>Renters Insurance</text:p>
          </table:table-cell>
          <table:table-cell office:value-type="string" calcext:value-type="string">
            <text:p>Housing (Rent/Mortgage)</text:p>
          </table:table-cell>
          <table:table-cell office:value-type="string" calcext:value-type="string">
            <text:p>Expense</text:p>
          </table:table-cell>
          <table:table-cell office:value-type="float" office:value="18.51" calcext:value-type="float">
            <text:p>$18.51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01" calcext:value-type="date">
            <text:p>2026-07-01</text:p>
          </table:table-cell>
          <table:table-cell office:value-type="string" calcext:value-type="string">
            <text:p>Car Insurance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xpense</text:p>
          </table:table-cell>
          <table:table-cell office:value-type="float" office:value="134.55" calcext:value-type="float">
            <text:p>$134.5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05" calcext:value-type="date">
            <text:p>2026-07-05</text:p>
          </table:table-cell>
          <table:table-cell office:value-type="string" calcext:value-type="string">
            <text:p>Brokerage Contribution</text:p>
          </table:table-cell>
          <table:table-cell office:value-type="string" calcext:value-type="string">
            <text:p>Savings/Investments</text:p>
          </table:table-cell>
          <table:table-cell office:value-type="string" calcext:value-type="string">
            <text:p>Expense</text:p>
          </table:table-cell>
          <table:table-cell office:value-type="float" office:value="85.92" calcext:value-type="float">
            <text:p>$85.92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09" calcext:value-type="date">
            <text:p>2026-07-09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Expense</text:p>
          </table:table-cell>
          <table:table-cell office:value-type="float" office:value="27.19" calcext:value-type="float">
            <text:p>$27.19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7-13" calcext:value-type="date">
            <text:p>2026-07-13</text:p>
          </table:table-cell>
          <table:table-cell table:style-name="ce5" office:value-type="string" calcext:value-type="string">
            <text:p>Freelance Payment - Client B</text:p>
          </table:table-cell>
          <table:table-cell table:style-name="ce5" office:value-type="string" calcext:value-type="string">
            <text:p>Freelance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440.29" calcext:value-type="float">
            <text:p>$440.29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7-14" calcext:value-type="date">
            <text:p>2026-07-14</text:p>
          </table:table-cell>
          <table:table-cell table:style-name="ce5" office:value-type="string" calcext:value-type="string">
            <text:p>Interest Income</text:p>
          </table:table-cell>
          <table:table-cell table:style-name="ce5" office:value-type="string" calcext:value-type="string">
            <text:p>Investments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34.15" calcext:value-type="float">
            <text:p>$34.1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19" calcext:value-type="date">
            <text:p>2026-07-19</text:p>
          </table:table-cell>
          <table:table-cell office:value-type="string" calcext:value-type="string">
            <text:p>Gas Bill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</text:p>
          </table:table-cell>
          <table:table-cell office:value-type="float" office:value="47.11" calcext:value-type="float">
            <text:p>$47.11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7-22" calcext:value-type="date">
            <text:p>2026-07-22</text:p>
          </table:table-cell>
          <table:table-cell table:style-name="ce5" office:value-type="string" calcext:value-type="string">
            <text:p>Sold Item Online</text:p>
          </table:table-cell>
          <table:table-cell table:style-name="ce5" office:value-type="string" calcext:value-type="string">
            <text:p>Other Income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79.44" calcext:value-type="float">
            <text:p>$79.44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25" calcext:value-type="date">
            <text:p>2026-07-25</text:p>
          </table:table-cell>
          <table:table-cell office:value-type="string" calcext:value-type="string">
            <text:p>Water Bill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</text:p>
          </table:table-cell>
          <table:table-cell office:value-type="float" office:value="47.83" calcext:value-type="float">
            <text:p>$47.83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25" calcext:value-type="date">
            <text:p>2026-07-25</text:p>
          </table:table-cell>
          <table:table-cell office:value-type="string" calcext:value-type="string">
            <text:p>Transfer to Savings</text:p>
          </table:table-cell>
          <table:table-cell office:value-type="string" calcext:value-type="string">
            <text:p>Savings/Investments</text:p>
          </table:table-cell>
          <table:table-cell office:value-type="string" calcext:value-type="string">
            <text:p>Expense</text:p>
          </table:table-cell>
          <table:table-cell office:value-type="float" office:value="175.79" calcext:value-type="float">
            <text:p>$175.7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7-28" calcext:value-type="date">
            <text:p>2026-07-28</text:p>
          </table:table-cell>
          <table:table-cell office:value-type="string" calcext:value-type="string">
            <text:p>Rent Payment</text:p>
          </table:table-cell>
          <table:table-cell office:value-type="string" calcext:value-type="string">
            <text:p>Housing (Rent/Mortgage)</text:p>
          </table:table-cell>
          <table:table-cell office:value-type="string" calcext:value-type="string">
            <text:p>Expense</text:p>
          </table:table-cell>
          <table:table-cell office:value-type="float" office:value="1200" calcext:value-type="float">
            <text:p>$1,20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03" calcext:value-type="date">
            <text:p>2026-08-03</text:p>
          </table:table-cell>
          <table:table-cell office:value-type="string" calcext:value-type="string">
            <text:p>Streaming Service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pense</text:p>
          </table:table-cell>
          <table:table-cell office:value-type="float" office:value="19.35" calcext:value-type="float">
            <text:p>$19.3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05" calcext:value-type="date">
            <text:p>2026-08-05</text:p>
          </table:table-cell>
          <table:table-cell office:value-type="string" calcext:value-type="string">
            <text:p>Food Delivery</text:p>
          </table:table-cell>
          <table:table-cell office:value-type="string" calcext:value-type="string">
            <text:p>Dining Out</text:p>
          </table:table-cell>
          <table:table-cell office:value-type="string" calcext:value-type="string">
            <text:p>Expense</text:p>
          </table:table-cell>
          <table:table-cell office:value-type="float" office:value="29.54" calcext:value-type="float">
            <text:p>$29.54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05" calcext:value-type="date">
            <text:p>2026-08-05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</text:p>
          </table:table-cell>
          <table:table-cell office:value-type="float" office:value="15" calcext:value-type="float">
            <text:p>$15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08" calcext:value-type="date">
            <text:p>2026-08-08</text:p>
          </table:table-cell>
          <table:table-cell office:value-type="string" calcext:value-type="string">
            <text:p>Brokerage Contribution</text:p>
          </table:table-cell>
          <table:table-cell office:value-type="string" calcext:value-type="string">
            <text:p>Savings/Investments</text:p>
          </table:table-cell>
          <table:table-cell office:value-type="string" calcext:value-type="string">
            <text:p>Expense</text:p>
          </table:table-cell>
          <table:table-cell office:value-type="float" office:value="104.3" calcext:value-type="float">
            <text:p>$104.3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13" calcext:value-type="date">
            <text:p>2026-08-13</text:p>
          </table:table-cell>
          <table:table-cell office:value-type="string" calcext:value-type="string">
            <text:p>Amazon Prime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</text:p>
          </table:table-cell>
          <table:table-cell office:value-type="float" office:value="14" calcext:value-type="float">
            <text:p>$14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15" calcext:value-type="date">
            <text:p>2026-08-15</text:p>
          </table:table-cell>
          <table:table-cell office:value-type="string" calcext:value-type="string">
            <text:p>Doctor Co-pay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Expense</text:p>
          </table:table-cell>
          <table:table-cell office:value-type="float" office:value="31.22" calcext:value-type="float">
            <text:p>$31.22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8-20" calcext:value-type="date">
            <text:p>2026-08-20</text:p>
          </table:table-cell>
          <table:table-cell table:style-name="ce5" office:value-type="string" calcext:value-type="string">
            <text:p>Dividend Payment</text:p>
          </table:table-cell>
          <table:table-cell table:style-name="ce5" office:value-type="string" calcext:value-type="string">
            <text:p>Investments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35.76" calcext:value-type="float">
            <text:p>$35.76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21" calcext:value-type="date">
            <text:p>2026-08-21</text:p>
          </table:table-cell>
          <table:table-cell office:value-type="string" calcext:value-type="string">
            <text:p>Fast Food</text:p>
          </table:table-cell>
          <table:table-cell office:value-type="string" calcext:value-type="string">
            <text:p>Dining Out</text:p>
          </table:table-cell>
          <table:table-cell office:value-type="string" calcext:value-type="string">
            <text:p>Expense</text:p>
          </table:table-cell>
          <table:table-cell office:value-type="float" office:value="9.95" calcext:value-type="float">
            <text:p>$9.9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24" calcext:value-type="date">
            <text:p>2026-08-24</text:p>
          </table:table-cell>
          <table:table-cell office:value-type="string" calcext:value-type="string">
            <text:p>Kroger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Expense</text:p>
          </table:table-cell>
          <table:table-cell office:value-type="float" office:value="43.38" calcext:value-type="float">
            <text:p>$43.3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8-28" calcext:value-type="date">
            <text:p>2026-08-28</text:p>
          </table:table-cell>
          <table:table-cell office:value-type="string" calcext:value-type="string">
            <text:p>Dentist Visit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Expense</text:p>
          </table:table-cell>
          <table:table-cell office:value-type="float" office:value="136.08" calcext:value-type="float">
            <text:p>$136.0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9-01" calcext:value-type="date">
            <text:p>2026-09-01</text:p>
          </table:table-cell>
          <table:table-cell office:value-type="string" calcext:value-type="string">
            <text:p>Gift Purchase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Expense</text:p>
          </table:table-cell>
          <table:table-cell office:value-type="float" office:value="35.9" calcext:value-type="float">
            <text:p>$35.9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9-06" calcext:value-type="date">
            <text:p>2026-09-06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Subscriptions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$10.0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9-13" calcext:value-type="date">
            <text:p>2026-09-13</text:p>
          </table:table-cell>
          <table:table-cell office:value-type="string" calcext:value-type="string">
            <text:p>Car Insurance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xpense</text:p>
          </table:table-cell>
          <table:table-cell office:value-type="float" office:value="105.71" calcext:value-type="float">
            <text:p>$105.71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9-17" calcext:value-type="date">
            <text:p>2026-09-17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Dining Out</text:p>
          </table:table-cell>
          <table:table-cell office:value-type="string" calcext:value-type="string">
            <text:p>Expense</text:p>
          </table:table-cell>
          <table:table-cell office:value-type="float" office:value="8.74" calcext:value-type="float">
            <text:p>$8.74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09-18" calcext:value-type="date">
            <text:p>2026-09-18</text:p>
          </table:table-cell>
          <table:table-cell table:style-name="ce5" office:value-type="string" calcext:value-type="string">
            <text:p>Freelance Payment - Client A</text:p>
          </table:table-cell>
          <table:table-cell table:style-name="ce5" office:value-type="string" calcext:value-type="string">
            <text:p>Freelance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241.11" calcext:value-type="float">
            <text:p>$241.11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09-18" calcext:value-type="date">
            <text:p>2026-09-18</text:p>
          </table:table-cell>
          <table:table-cell office:value-type="string" calcext:value-type="string">
            <text:p>Parking Fee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xpense</text:p>
          </table:table-cell>
          <table:table-cell office:value-type="float" office:value="9.97" calcext:value-type="float">
            <text:p>$9.9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0-02" calcext:value-type="date">
            <text:p>2026-10-02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xpense</text:p>
          </table:table-cell>
          <table:table-cell office:value-type="float" office:value="67.21" calcext:value-type="float">
            <text:p>$67.21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10-05" calcext:value-type="date">
            <text:p>2026-10-05</text:p>
          </table:table-cell>
          <table:table-cell table:style-name="ce5" office:value-type="string" calcext:value-type="string">
            <text:p>Freelance Payment - Client B</text:p>
          </table:table-cell>
          <table:table-cell table:style-name="ce5" office:value-type="string" calcext:value-type="string">
            <text:p>Freelance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170.01" calcext:value-type="float">
            <text:p>$170.01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10-07" calcext:value-type="date">
            <text:p>2026-10-07</text:p>
          </table:table-cell>
          <table:table-cell table:style-name="ce5" office:value-type="string" calcext:value-type="string">
            <text:p>Interest Income</text:p>
          </table:table-cell>
          <table:table-cell table:style-name="ce5" office:value-type="string" calcext:value-type="string">
            <text:p>Investments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11.27" calcext:value-type="float">
            <text:p>$11.27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10-09" calcext:value-type="date">
            <text:p>2026-10-09</text:p>
          </table:table-cell>
          <table:table-cell table:style-name="ce5" office:value-type="string" calcext:value-type="string">
            <text:p>Dividend Payment</text:p>
          </table:table-cell>
          <table:table-cell table:style-name="ce5" office:value-type="string" calcext:value-type="string">
            <text:p>Investments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117.21" calcext:value-type="float">
            <text:p>$117.21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0-14" calcext:value-type="date">
            <text:p>2026-10-14</text:p>
          </table:table-cell>
          <table:table-cell office:value-type="string" calcext:value-type="string">
            <text:p>Brokerage Contribution</text:p>
          </table:table-cell>
          <table:table-cell office:value-type="string" calcext:value-type="string">
            <text:p>Savings/Investments</text:p>
          </table:table-cell>
          <table:table-cell office:value-type="string" calcext:value-type="string">
            <text:p>Expense</text:p>
          </table:table-cell>
          <table:table-cell office:value-type="float" office:value="196.08" calcext:value-type="float">
            <text:p>$196.0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0-18" calcext:value-type="date">
            <text:p>2026-10-18</text:p>
          </table:table-cell>
          <table:table-cell office:value-type="string" calcext:value-type="string">
            <text:p>Brokerage Contribution</text:p>
          </table:table-cell>
          <table:table-cell office:value-type="string" calcext:value-type="string">
            <text:p>Savings/Investments</text:p>
          </table:table-cell>
          <table:table-cell office:value-type="string" calcext:value-type="string">
            <text:p>Expense</text:p>
          </table:table-cell>
          <table:table-cell office:value-type="float" office:value="81.89" calcext:value-type="float">
            <text:p>$81.8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0-19" calcext:value-type="date">
            <text:p>2026-10-19</text:p>
          </table:table-cell>
          <table:table-cell office:value-type="string" calcext:value-type="string">
            <text:p>Electric Bill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</text:p>
          </table:table-cell>
          <table:table-cell office:value-type="float" office:value="103.36" calcext:value-type="float">
            <text:p>$103.36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0-20" calcext:value-type="date">
            <text:p>2026-10-20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Expense</text:p>
          </table:table-cell>
          <table:table-cell office:value-type="float" office:value="41.38" calcext:value-type="float">
            <text:p>$41.38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0-27" calcext:value-type="date">
            <text:p>2026-10-27</text:p>
          </table:table-cell>
          <table:table-cell office:value-type="string" calcext:value-type="string">
            <text:p>Health Insurance Premiu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208.53" calcext:value-type="float">
            <text:p>$208.53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0-29" calcext:value-type="date">
            <text:p>2026-10-29</text:p>
          </table:table-cell>
          <table:table-cell office:value-type="string" calcext:value-type="string">
            <text:p>Electric Bill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xpense</text:p>
          </table:table-cell>
          <table:table-cell office:value-type="float" office:value="113.12" calcext:value-type="float">
            <text:p>$113.12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1-03" calcext:value-type="date">
            <text:p>2026-11-03</text:p>
          </table:table-cell>
          <table:table-cell office:value-type="string" calcext:value-type="string">
            <text:p>Whole Foods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Expense</text:p>
          </table:table-cell>
          <table:table-cell office:value-type="float" office:value="48.95" calcext:value-type="float">
            <text:p>$48.95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1-07" calcext:value-type="date">
            <text:p>2026-11-07</text:p>
          </table:table-cell>
          <table:table-cell office:value-type="string" calcext:value-type="string">
            <text:p>Uber Ride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xpense</text:p>
          </table:table-cell>
          <table:table-cell office:value-type="float" office:value="33.22" calcext:value-type="float">
            <text:p>$33.22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1-13" calcext:value-type="date">
            <text:p>2026-11-13</text:p>
          </table:table-cell>
          <table:table-cell office:value-type="string" calcext:value-type="string">
            <text:p>Brokerage Contribution</text:p>
          </table:table-cell>
          <table:table-cell office:value-type="string" calcext:value-type="string">
            <text:p>Savings/Investments</text:p>
          </table:table-cell>
          <table:table-cell office:value-type="string" calcext:value-type="string">
            <text:p>Expense</text:p>
          </table:table-cell>
          <table:table-cell office:value-type="float" office:value="136.6" calcext:value-type="float">
            <text:p>$136.60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11-24" calcext:value-type="date">
            <text:p>2026-11-24</text:p>
          </table:table-cell>
          <table:table-cell table:style-name="ce5" office:value-type="string" calcext:value-type="string">
            <text:p>Interest Income</text:p>
          </table:table-cell>
          <table:table-cell table:style-name="ce5" office:value-type="string" calcext:value-type="string">
            <text:p>Investments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19.8" calcext:value-type="float">
            <text:p>$19.80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1-24" calcext:value-type="date">
            <text:p>2026-11-24</text:p>
          </table:table-cell>
          <table:table-cell office:value-type="string" calcext:value-type="string">
            <text:p>Concert Ticket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pense</text:p>
          </table:table-cell>
          <table:table-cell office:value-type="float" office:value="94.77" calcext:value-type="float">
            <text:p>$94.77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1-29" calcext:value-type="date">
            <text:p>2026-11-29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pense</text:p>
          </table:table-cell>
          <table:table-cell office:value-type="float" office:value="24.92" calcext:value-type="float">
            <text:p>$24.92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2-01" calcext:value-type="date">
            <text:p>2026-12-01</text:p>
          </table:table-cell>
          <table:table-cell office:value-type="string" calcext:value-type="string">
            <text:p>Dentist Visit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Expense</text:p>
          </table:table-cell>
          <table:table-cell office:value-type="float" office:value="131.71" calcext:value-type="float">
            <text:p>$131.71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2-04" calcext:value-type="date">
            <text:p>2026-12-04</text:p>
          </table:table-cell>
          <table:table-cell office:value-type="string" calcext:value-type="string">
            <text:p>Renters Insurance</text:p>
          </table:table-cell>
          <table:table-cell office:value-type="string" calcext:value-type="string">
            <text:p>Housing (Rent/Mortgage)</text:p>
          </table:table-cell>
          <table:table-cell office:value-type="string" calcext:value-type="string">
            <text:p>Expense</text:p>
          </table:table-cell>
          <table:table-cell office:value-type="float" office:value="16.39" calcext:value-type="float">
            <text:p>$16.3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2-10" calcext:value-type="date">
            <text:p>2026-12-10</text:p>
          </table:table-cell>
          <table:table-cell office:value-type="string" calcext:value-type="string">
            <text:p>Food Delivery</text:p>
          </table:table-cell>
          <table:table-cell office:value-type="string" calcext:value-type="string">
            <text:p>Dining Out</text:p>
          </table:table-cell>
          <table:table-cell office:value-type="string" calcext:value-type="string">
            <text:p>Expense</text:p>
          </table:table-cell>
          <table:table-cell office:value-type="float" office:value="42.49" calcext:value-type="float">
            <text:p>$42.4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2-16" calcext:value-type="date">
            <text:p>2026-12-16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Dining Out</text:p>
          </table:table-cell>
          <table:table-cell office:value-type="string" calcext:value-type="string">
            <text:p>Expense</text:p>
          </table:table-cell>
          <table:table-cell office:value-type="float" office:value="10.34" calcext:value-type="float">
            <text:p>$10.34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2-20" calcext:value-type="date">
            <text:p>2026-12-20</text:p>
          </table:table-cell>
          <table:table-cell office:value-type="string" calcext:value-type="string">
            <text:p>Renters Insurance</text:p>
          </table:table-cell>
          <table:table-cell office:value-type="string" calcext:value-type="string">
            <text:p>Housing (Rent/Mortgage)</text:p>
          </table:table-cell>
          <table:table-cell office:value-type="string" calcext:value-type="string">
            <text:p>Expense</text:p>
          </table:table-cell>
          <table:table-cell office:value-type="float" office:value="16.99" calcext:value-type="float">
            <text:p>$16.99</text:p>
          </table:table-cell>
          <table:table-cell table:style-name="Default" table:number-columns-repeated="16379"/>
        </table:table-row>
        <table:table-row table:style-name="ro3">
          <table:table-cell office:value-type="date" office:date-value="2026-12-23" calcext:value-type="date">
            <text:p>2026-12-23</text:p>
          </table:table-cell>
          <table:table-cell office:value-type="string" calcext:value-type="string">
            <text:p>Pet Supplies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Expense</text:p>
          </table:table-cell>
          <table:table-cell office:value-type="float" office:value="18.87" calcext:value-type="float">
            <text:p>$18.87</text:p>
          </table:table-cell>
          <table:table-cell table:style-name="Default" table:number-columns-repeated="16379"/>
        </table:table-row>
        <table:table-row table:style-name="ro3">
          <table:table-cell table:style-name="ce3" office:value-type="date" office:date-value="2026-12-27" calcext:value-type="date">
            <text:p>2026-12-27</text:p>
          </table:table-cell>
          <table:table-cell table:style-name="ce5" office:value-type="string" calcext:value-type="string">
            <text:p>Freelance Payment - Client A</text:p>
          </table:table-cell>
          <table:table-cell table:style-name="ce5" office:value-type="string" calcext:value-type="string">
            <text:p>Freelance</text:p>
          </table:table-cell>
          <table:table-cell table:style-name="ce7" office:value-type="string" calcext:value-type="string">
            <text:p>Income</text:p>
          </table:table-cell>
          <table:table-cell table:style-name="ce9" office:value-type="float" office:value="663.84" calcext:value-type="float">
            <text:p>$663.84</text:p>
          </table:table-cell>
          <table:table-cell table:style-name="Default" table:number-columns-repeated="16379"/>
        </table:table-row>
      </table:table>
      <table:table table:name="Data Collection" table:style-name="ta2">
        <table:table-column table:style-name="co3" table:default-cell-style-name="ce6"/>
        <table:table-column table:style-name="co6" table:number-columns-repeated="12" table:default-cell-style-name="ce10"/>
        <table:table-column table:style-name="co7" table:default-cell-style-name="ce20"/>
        <table:table-column table:style-name="co5" table:default-cell-style-name="Default"/>
        <table:table-column table:style-name="co5" table:number-columns-repeated="16369"/>
        <table:table-row table:style-name="ro1">
          <table:table-cell table:style-name="ce1" office:value-type="string" calcext:value-type="string" table:number-columns-spanned="15" table:number-rows-spanned="1">
            <text:p>Personal Budget — Data Collection</text:p>
          </table:table-cell>
          <table:covered-table-cell table:number-columns-repeated="13" table:style-name="Default"/>
          <table:covered-table-cell/>
          <table:table-cell table:style-name="Default" table:number-columns-repeated="16369"/>
        </table:table-row>
        <table:table-row table:style-name="ro2"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string" calcext:value-type="string">
            <text:p>Sep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Default" table:number-columns-repeated="16369"/>
        </table:table-row>
        <table:table-row table:style-name="ro4">
          <table:covered-table-cell table:style-name="Default"/>
          <table:table-cell table:style-name="Default" table:number-columns-repeated="13"/>
          <table:table-cell/>
          <table:table-cell table:style-name="Default" table:number-columns-repeated="16369"/>
        </table:table-row>
        <table:table-row table:style-name="ro5">
          <table:table-cell table:style-name="ce12" office:value-type="string" calcext:value-type="string" table:number-columns-spanned="14" table:number-rows-spanned="1">
            <text:p>INCOME</text:p>
          </table:table-cell>
          <table:covered-table-cell table:number-columns-repeated="13" table:style-name="Default"/>
          <table:table-cell/>
          <table:table-cell table:style-name="Default" table:number-columns-repeated="16369"/>
        </table:table-row>
        <table:table-row table:style-name="ro3">
          <table:table-cell table:style-name="ce13" office:value-type="string" calcext:value-type="string">
            <text:p>Salary</text:p>
          </table:table-cell>
          <table:table-cell table:style-name="ce9" table:formula="of:=SUMPRODUCT(([$Transactions.$C$3:.$C$102]=&quot;Salary&quot;)*(MONTH([$Transactions.$A$3:.$A$102])=1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Salary&quot;)*(MONTH([$Transactions.$A$3:.$A$102])=2)*[$Transactions.$E$3:.$E$102])" office:value-type="float" office:value="3200" calcext:value-type="float">
            <text:p>$3,200.00</text:p>
          </table:table-cell>
          <table:table-cell table:style-name="ce9" table:formula="of:=SUMPRODUCT(([$Transactions.$C$3:.$C$102]=&quot;Salary&quot;)*(MONTH([$Transactions.$A$3:.$A$102])=3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Salary&quot;)*(MONTH([$Transactions.$A$3:.$A$102])=4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Salary&quot;)*(MONTH([$Transactions.$A$3:.$A$102])=5)*[$Transactions.$E$3:.$E$102])" office:value-type="float" office:value="3200" calcext:value-type="float">
            <text:p>$3,200.00</text:p>
          </table:table-cell>
          <table:table-cell table:style-name="ce9" table:formula="of:=SUMPRODUCT(([$Transactions.$C$3:.$C$102]=&quot;Salary&quot;)*(MONTH([$Transactions.$A$3:.$A$102])=6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Salary&quot;)*(MONTH([$Transactions.$A$3:.$A$102])=7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Salary&quot;)*(MONTH([$Transactions.$A$3:.$A$102])=8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Salary&quot;)*(MONTH([$Transactions.$A$3:.$A$102])=9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Salary&quot;)*(MONTH([$Transactions.$A$3:.$A$102])=10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Salary&quot;)*(MONTH([$Transactions.$A$3:.$A$102])=11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Salary&quot;)*(MONTH([$Transactions.$A$3:.$A$102])=12)*[$Transactions.$E$3:.$E$102])" office:value-type="float" office:value="0" calcext:value-type="float">
            <text:p>$0.00</text:p>
          </table:table-cell>
          <table:table-cell table:style-name="ce19" table:formula="of:=SUM([.B5:.M5])" office:value-type="float" office:value="6400" calcext:value-type="float">
            <text:p>$6,400.00</text:p>
          </table:table-cell>
          <table:table-cell/>
          <table:table-cell table:style-name="Default" table:number-columns-repeated="16369"/>
        </table:table-row>
        <table:table-row table:style-name="ro3">
          <table:table-cell table:style-name="ce13" office:value-type="string" calcext:value-type="string">
            <text:p>Freelance</text:p>
          </table:table-cell>
          <table:table-cell table:style-name="ce9" table:formula="of:=SUMPRODUCT(([$Transactions.$C$3:.$C$102]=&quot;Freelance&quot;)*(MONTH([$Transactions.$A$3:.$A$102])=1)*[$Transactions.$E$3:.$E$102])" office:value-type="float" office:value="337.37" calcext:value-type="float">
            <text:p>$337.37</text:p>
          </table:table-cell>
          <table:table-cell table:style-name="ce9" table:formula="of:=SUMPRODUCT(([$Transactions.$C$3:.$C$102]=&quot;Freelance&quot;)*(MONTH([$Transactions.$A$3:.$A$102])=2)*[$Transactions.$E$3:.$E$102])" office:value-type="float" office:value="527.35" calcext:value-type="float">
            <text:p>$527.35</text:p>
          </table:table-cell>
          <table:table-cell table:style-name="ce9" table:formula="of:=SUMPRODUCT(([$Transactions.$C$3:.$C$102]=&quot;Freelance&quot;)*(MONTH([$Transactions.$A$3:.$A$102])=3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Freelance&quot;)*(MONTH([$Transactions.$A$3:.$A$102])=4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Freelance&quot;)*(MONTH([$Transactions.$A$3:.$A$102])=5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Freelance&quot;)*(MONTH([$Transactions.$A$3:.$A$102])=6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Freelance&quot;)*(MONTH([$Transactions.$A$3:.$A$102])=7)*[$Transactions.$E$3:.$E$102])" office:value-type="float" office:value="440.29" calcext:value-type="float">
            <text:p>$440.29</text:p>
          </table:table-cell>
          <table:table-cell table:style-name="ce9" table:formula="of:=SUMPRODUCT(([$Transactions.$C$3:.$C$102]=&quot;Freelance&quot;)*(MONTH([$Transactions.$A$3:.$A$102])=8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Freelance&quot;)*(MONTH([$Transactions.$A$3:.$A$102])=9)*[$Transactions.$E$3:.$E$102])" office:value-type="float" office:value="241.11" calcext:value-type="float">
            <text:p>$241.11</text:p>
          </table:table-cell>
          <table:table-cell table:style-name="ce9" table:formula="of:=SUMPRODUCT(([$Transactions.$C$3:.$C$102]=&quot;Freelance&quot;)*(MONTH([$Transactions.$A$3:.$A$102])=10)*[$Transactions.$E$3:.$E$102])" office:value-type="float" office:value="170.01" calcext:value-type="float">
            <text:p>$170.01</text:p>
          </table:table-cell>
          <table:table-cell table:style-name="ce9" table:formula="of:=SUMPRODUCT(([$Transactions.$C$3:.$C$102]=&quot;Freelance&quot;)*(MONTH([$Transactions.$A$3:.$A$102])=11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Freelance&quot;)*(MONTH([$Transactions.$A$3:.$A$102])=12)*[$Transactions.$E$3:.$E$102])" office:value-type="float" office:value="663.84" calcext:value-type="float">
            <text:p>$663.84</text:p>
          </table:table-cell>
          <table:table-cell table:style-name="ce19" table:formula="of:=SUM([.B6:.M6])" office:value-type="float" office:value="2379.97" calcext:value-type="float">
            <text:p>$2,379.97</text:p>
          </table:table-cell>
          <table:table-cell/>
          <table:table-cell table:style-name="Default" table:number-columns-repeated="16369"/>
        </table:table-row>
        <table:table-row table:style-name="ro3">
          <table:table-cell table:style-name="ce13" office:value-type="string" calcext:value-type="string">
            <text:p>Investments</text:p>
          </table:table-cell>
          <table:table-cell table:style-name="ce9" table:formula="of:=SUMPRODUCT(([$Transactions.$C$3:.$C$102]=&quot;Investments&quot;)*(MONTH([$Transactions.$A$3:.$A$102])=1)*[$Transactions.$E$3:.$E$102])" office:value-type="float" office:value="17.14" calcext:value-type="float">
            <text:p>$17.14</text:p>
          </table:table-cell>
          <table:table-cell table:style-name="ce9" table:formula="of:=SUMPRODUCT(([$Transactions.$C$3:.$C$102]=&quot;Investments&quot;)*(MONTH([$Transactions.$A$3:.$A$102])=2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Investments&quot;)*(MONTH([$Transactions.$A$3:.$A$102])=3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Investments&quot;)*(MONTH([$Transactions.$A$3:.$A$102])=4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Investments&quot;)*(MONTH([$Transactions.$A$3:.$A$102])=5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Investments&quot;)*(MONTH([$Transactions.$A$3:.$A$102])=6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Investments&quot;)*(MONTH([$Transactions.$A$3:.$A$102])=7)*[$Transactions.$E$3:.$E$102])" office:value-type="float" office:value="34.15" calcext:value-type="float">
            <text:p>$34.15</text:p>
          </table:table-cell>
          <table:table-cell table:style-name="ce9" table:formula="of:=SUMPRODUCT(([$Transactions.$C$3:.$C$102]=&quot;Investments&quot;)*(MONTH([$Transactions.$A$3:.$A$102])=8)*[$Transactions.$E$3:.$E$102])" office:value-type="float" office:value="35.76" calcext:value-type="float">
            <text:p>$35.76</text:p>
          </table:table-cell>
          <table:table-cell table:style-name="ce9" table:formula="of:=SUMPRODUCT(([$Transactions.$C$3:.$C$102]=&quot;Investments&quot;)*(MONTH([$Transactions.$A$3:.$A$102])=9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Investments&quot;)*(MONTH([$Transactions.$A$3:.$A$102])=10)*[$Transactions.$E$3:.$E$102])" office:value-type="float" office:value="128.48" calcext:value-type="float">
            <text:p>$128.48</text:p>
          </table:table-cell>
          <table:table-cell table:style-name="ce9" table:formula="of:=SUMPRODUCT(([$Transactions.$C$3:.$C$102]=&quot;Investments&quot;)*(MONTH([$Transactions.$A$3:.$A$102])=11)*[$Transactions.$E$3:.$E$102])" office:value-type="float" office:value="19.8" calcext:value-type="float">
            <text:p>$19.80</text:p>
          </table:table-cell>
          <table:table-cell table:style-name="ce9" table:formula="of:=SUMPRODUCT(([$Transactions.$C$3:.$C$102]=&quot;Investments&quot;)*(MONTH([$Transactions.$A$3:.$A$102])=12)*[$Transactions.$E$3:.$E$102])" office:value-type="float" office:value="0" calcext:value-type="float">
            <text:p>$0.00</text:p>
          </table:table-cell>
          <table:table-cell table:style-name="ce19" table:formula="of:=SUM([.B7:.M7])" office:value-type="float" office:value="235.33" calcext:value-type="float">
            <text:p>$235.33</text:p>
          </table:table-cell>
          <table:table-cell/>
          <table:table-cell table:style-name="Default" table:number-columns-repeated="16369"/>
        </table:table-row>
        <table:table-row table:style-name="ro3">
          <table:table-cell table:style-name="ce13" office:value-type="string" calcext:value-type="string">
            <text:p>Other Income</text:p>
          </table:table-cell>
          <table:table-cell table:style-name="ce9" table:formula="of:=SUMPRODUCT(([$Transactions.$C$3:.$C$102]=&quot;Other Income&quot;)*(MONTH([$Transactions.$A$3:.$A$102])=1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Other Income&quot;)*(MONTH([$Transactions.$A$3:.$A$102])=2)*[$Transactions.$E$3:.$E$102])" office:value-type="float" office:value="337.62" calcext:value-type="float">
            <text:p>$337.62</text:p>
          </table:table-cell>
          <table:table-cell table:style-name="ce9" table:formula="of:=SUMPRODUCT(([$Transactions.$C$3:.$C$102]=&quot;Other Income&quot;)*(MONTH([$Transactions.$A$3:.$A$102])=3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Other Income&quot;)*(MONTH([$Transactions.$A$3:.$A$102])=4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Other Income&quot;)*(MONTH([$Transactions.$A$3:.$A$102])=5)*[$Transactions.$E$3:.$E$102])" office:value-type="float" office:value="137.67" calcext:value-type="float">
            <text:p>$137.67</text:p>
          </table:table-cell>
          <table:table-cell table:style-name="ce9" table:formula="of:=SUMPRODUCT(([$Transactions.$C$3:.$C$102]=&quot;Other Income&quot;)*(MONTH([$Transactions.$A$3:.$A$102])=6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Other Income&quot;)*(MONTH([$Transactions.$A$3:.$A$102])=7)*[$Transactions.$E$3:.$E$102])" office:value-type="float" office:value="79.44" calcext:value-type="float">
            <text:p>$79.44</text:p>
          </table:table-cell>
          <table:table-cell table:style-name="ce9" table:formula="of:=SUMPRODUCT(([$Transactions.$C$3:.$C$102]=&quot;Other Income&quot;)*(MONTH([$Transactions.$A$3:.$A$102])=8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Other Income&quot;)*(MONTH([$Transactions.$A$3:.$A$102])=9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Other Income&quot;)*(MONTH([$Transactions.$A$3:.$A$102])=10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Other Income&quot;)*(MONTH([$Transactions.$A$3:.$A$102])=11)*[$Transactions.$E$3:.$E$102])" office:value-type="float" office:value="0" calcext:value-type="float">
            <text:p>$0.00</text:p>
          </table:table-cell>
          <table:table-cell table:style-name="ce9" table:formula="of:=SUMPRODUCT(([$Transactions.$C$3:.$C$102]=&quot;Other Income&quot;)*(MONTH([$Transactions.$A$3:.$A$102])=12)*[$Transactions.$E$3:.$E$102])" office:value-type="float" office:value="0" calcext:value-type="float">
            <text:p>$0.00</text:p>
          </table:table-cell>
          <table:table-cell table:style-name="ce19" table:formula="of:=SUM([.B8:.M8])" office:value-type="float" office:value="554.73" calcext:value-type="float">
            <text:p>$554.73</text:p>
          </table:table-cell>
          <table:table-cell/>
          <table:table-cell table:style-name="Default" table:number-columns-repeated="16369"/>
        </table:table-row>
        <table:table-row table:style-name="ro3">
          <table:table-cell table:style-name="ce14" office:value-type="string" calcext:value-type="string">
            <text:p>Total Income</text:p>
          </table:table-cell>
          <table:table-cell table:style-name="ce17" table:formula="of:=SUM([.B5];[.B6];[.B7];[.B8])" office:value-type="float" office:value="354.51" calcext:value-type="float">
            <text:p>$354.51</text:p>
          </table:table-cell>
          <table:table-cell table:style-name="ce17" table:formula="of:=SUM([.C5];[.C6];[.C7];[.C8])" office:value-type="float" office:value="4064.97" calcext:value-type="float">
            <text:p>$4,064.97</text:p>
          </table:table-cell>
          <table:table-cell table:style-name="ce17" table:formula="of:=SUM([.D5];[.D6];[.D7];[.D8])" office:value-type="float" office:value="0" calcext:value-type="float">
            <text:p>$0.00</text:p>
          </table:table-cell>
          <table:table-cell table:style-name="ce17" table:formula="of:=SUM([.E5];[.E6];[.E7];[.E8])" office:value-type="float" office:value="0" calcext:value-type="float">
            <text:p>$0.00</text:p>
          </table:table-cell>
          <table:table-cell table:style-name="ce17" table:formula="of:=SUM([.F5];[.F6];[.F7];[.F8])" office:value-type="float" office:value="3337.67" calcext:value-type="float">
            <text:p>$3,337.67</text:p>
          </table:table-cell>
          <table:table-cell table:style-name="ce17" table:formula="of:=SUM([.G5];[.G6];[.G7];[.G8])" office:value-type="float" office:value="0" calcext:value-type="float">
            <text:p>$0.00</text:p>
          </table:table-cell>
          <table:table-cell table:style-name="ce17" table:formula="of:=SUM([.H5];[.H6];[.H7];[.H8])" office:value-type="float" office:value="553.88" calcext:value-type="float">
            <text:p>$553.88</text:p>
          </table:table-cell>
          <table:table-cell table:style-name="ce17" table:formula="of:=SUM([.I5];[.I6];[.I7];[.I8])" office:value-type="float" office:value="35.76" calcext:value-type="float">
            <text:p>$35.76</text:p>
          </table:table-cell>
          <table:table-cell table:style-name="ce17" table:formula="of:=SUM([.J5];[.J6];[.J7];[.J8])" office:value-type="float" office:value="241.11" calcext:value-type="float">
            <text:p>$241.11</text:p>
          </table:table-cell>
          <table:table-cell table:style-name="ce17" table:formula="of:=SUM([.K5];[.K6];[.K7];[.K8])" office:value-type="float" office:value="298.49" calcext:value-type="float">
            <text:p>$298.49</text:p>
          </table:table-cell>
          <table:table-cell table:style-name="ce17" table:formula="of:=SUM([.L5];[.L6];[.L7];[.L8])" office:value-type="float" office:value="19.8" calcext:value-type="float">
            <text:p>$19.80</text:p>
          </table:table-cell>
          <table:table-cell table:style-name="ce17" table:formula="of:=SUM([.M5];[.M6];[.M7];[.M8])" office:value-type="float" office:value="663.84" calcext:value-type="float">
            <text:p>$663.84</text:p>
          </table:table-cell>
          <table:table-cell table:style-name="ce17" table:formula="of:=SUM([.B9:.M9])" office:value-type="float" office:value="9570.03" calcext:value-type="float">
            <text:p>$9,570.03</text:p>
          </table:table-cell>
          <table:table-cell/>
          <table:table-cell table:style-name="Default" table:number-columns-repeated="16369"/>
        </table:table-row>
        <table:table-row table:style-name="ro3">
          <table:table-cell table:style-name="Default" table:number-columns-repeated="14"/>
          <table:table-cell/>
          <table:table-cell table:style-name="Default" table:number-columns-repeated="16369"/>
        </table:table-row>
        <table:table-row table:style-name="ro5">
          <table:table-cell table:style-name="ce15" office:value-type="string" calcext:value-type="string" table:number-columns-spanned="14" table:number-rows-spanned="1">
            <text:p>EXPENSES</text:p>
          </table:table-cell>
          <table:covered-table-cell table:number-columns-repeated="13" table:style-name="Default"/>
          <table:table-cell/>
          <table:table-cell table:style-name="Default" table:number-columns-repeated="16369"/>
        </table:table-row>
        <table:table-row table:style-name="ro3">
          <table:table-cell office:value-type="string" calcext:value-type="string">
            <text:p>Housing (Rent/Mortgage)</text:p>
          </table:table-cell>
          <table:table-cell table:formula="of:=SUMPRODUCT(([$Transactions.$C$3:.$C$102]=&quot;Housing (Rent/Mortgage)&quot;)*(MONTH([$Transactions.$A$3:.$A$102])=1)*[$Transactions.$E$3:.$E$102])" office:value-type="float" office:value="1200" calcext:value-type="float">
            <text:p>$1,200.00</text:p>
          </table:table-cell>
          <table:table-cell table:formula="of:=SUMPRODUCT(([$Transactions.$C$3:.$C$102]=&quot;Housing (Rent/Mortgage)&quot;)*(MONTH([$Transactions.$A$3:.$A$102])=2)*[$Transactions.$E$3:.$E$102])" office:value-type="float" office:value="1200" calcext:value-type="float">
            <text:p>$1,200.00</text:p>
          </table:table-cell>
          <table:table-cell table:formula="of:=SUMPRODUCT(([$Transactions.$C$3:.$C$102]=&quot;Housing (Rent/Mortgage)&quot;)*(MONTH([$Transactions.$A$3:.$A$102])=3)*[$Transactions.$E$3:.$E$102])" office:value-type="float" office:value="0" calcext:value-type="float">
            <text:p>$0.00</text:p>
          </table:table-cell>
          <table:table-cell table:formula="of:=SUMPRODUCT(([$Transactions.$C$3:.$C$102]=&quot;Housing (Rent/Mortgage)&quot;)*(MONTH([$Transactions.$A$3:.$A$102])=4)*[$Transactions.$E$3:.$E$102])" office:value-type="float" office:value="0" calcext:value-type="float">
            <text:p>$0.00</text:p>
          </table:table-cell>
          <table:table-cell table:formula="of:=SUMPRODUCT(([$Transactions.$C$3:.$C$102]=&quot;Housing (Rent/Mortgage)&quot;)*(MONTH([$Transactions.$A$3:.$A$102])=5)*[$Transactions.$E$3:.$E$102])" office:value-type="float" office:value="0" calcext:value-type="float">
            <text:p>$0.00</text:p>
          </table:table-cell>
          <table:table-cell table:formula="of:=SUMPRODUCT(([$Transactions.$C$3:.$C$102]=&quot;Housing (Rent/Mortgage)&quot;)*(MONTH([$Transactions.$A$3:.$A$102])=6)*[$Transactions.$E$3:.$E$102])" office:value-type="float" office:value="1200" calcext:value-type="float">
            <text:p>$1,200.00</text:p>
          </table:table-cell>
          <table:table-cell table:formula="of:=SUMPRODUCT(([$Transactions.$C$3:.$C$102]=&quot;Housing (Rent/Mortgage)&quot;)*(MONTH([$Transactions.$A$3:.$A$102])=7)*[$Transactions.$E$3:.$E$102])" office:value-type="float" office:value="1218.51" calcext:value-type="float">
            <text:p>$1,218.51</text:p>
          </table:table-cell>
          <table:table-cell table:formula="of:=SUMPRODUCT(([$Transactions.$C$3:.$C$102]=&quot;Housing (Rent/Mortgage)&quot;)*(MONTH([$Transactions.$A$3:.$A$102])=8)*[$Transactions.$E$3:.$E$102])" office:value-type="float" office:value="0" calcext:value-type="float">
            <text:p>$0.00</text:p>
          </table:table-cell>
          <table:table-cell table:formula="of:=SUMPRODUCT(([$Transactions.$C$3:.$C$102]=&quot;Housing (Rent/Mortgage)&quot;)*(MONTH([$Transactions.$A$3:.$A$102])=9)*[$Transactions.$E$3:.$E$102])" office:value-type="float" office:value="0" calcext:value-type="float">
            <text:p>$0.00</text:p>
          </table:table-cell>
          <table:table-cell table:formula="of:=SUMPRODUCT(([$Transactions.$C$3:.$C$102]=&quot;Housing (Rent/Mortgage)&quot;)*(MONTH([$Transactions.$A$3:.$A$102])=10)*[$Transactions.$E$3:.$E$102])" office:value-type="float" office:value="0" calcext:value-type="float">
            <text:p>$0.00</text:p>
          </table:table-cell>
          <table:table-cell table:formula="of:=SUMPRODUCT(([$Transactions.$C$3:.$C$102]=&quot;Housing (Rent/Mortgage)&quot;)*(MONTH([$Transactions.$A$3:.$A$102])=11)*[$Transactions.$E$3:.$E$102])" office:value-type="float" office:value="0" calcext:value-type="float">
            <text:p>$0.00</text:p>
          </table:table-cell>
          <table:table-cell table:formula="of:=SUMPRODUCT(([$Transactions.$C$3:.$C$102]=&quot;Housing (Rent/Mortgage)&quot;)*(MONTH([$Transactions.$A$3:.$A$102])=12)*[$Transactions.$E$3:.$E$102])" office:value-type="float" office:value="33.38" calcext:value-type="float">
            <text:p>$33.38</text:p>
          </table:table-cell>
          <table:table-cell table:formula="of:=SUM([.B12:.M12])" office:value-type="float" office:value="4851.89" calcext:value-type="float">
            <text:p>$4,851.89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calcext:value-type="string">
            <text:p>Utilities</text:p>
          </table:table-cell>
          <table:table-cell table:formula="of:=SUMPRODUCT(([$Transactions.$C$3:.$C$102]=&quot;Utilities&quot;)*(MONTH([$Transactions.$A$3:.$A$102])=1)*[$Transactions.$E$3:.$E$102])" office:value-type="float" office:value="0" calcext:value-type="float">
            <text:p>$0.00</text:p>
          </table:table-cell>
          <table:table-cell table:formula="of:=SUMPRODUCT(([$Transactions.$C$3:.$C$102]=&quot;Utilities&quot;)*(MONTH([$Transactions.$A$3:.$A$102])=2)*[$Transactions.$E$3:.$E$102])" office:value-type="float" office:value="0" calcext:value-type="float">
            <text:p>$0.00</text:p>
          </table:table-cell>
          <table:table-cell table:formula="of:=SUMPRODUCT(([$Transactions.$C$3:.$C$102]=&quot;Utilities&quot;)*(MONTH([$Transactions.$A$3:.$A$102])=3)*[$Transactions.$E$3:.$E$102])" office:value-type="float" office:value="227.32" calcext:value-type="float">
            <text:p>$227.32</text:p>
          </table:table-cell>
          <table:table-cell table:formula="of:=SUMPRODUCT(([$Transactions.$C$3:.$C$102]=&quot;Utilities&quot;)*(MONTH([$Transactions.$A$3:.$A$102])=4)*[$Transactions.$E$3:.$E$102])" office:value-type="float" office:value="0" calcext:value-type="float">
            <text:p>$0.00</text:p>
          </table:table-cell>
          <table:table-cell table:formula="of:=SUMPRODUCT(([$Transactions.$C$3:.$C$102]=&quot;Utilities&quot;)*(MONTH([$Transactions.$A$3:.$A$102])=5)*[$Transactions.$E$3:.$E$102])" office:value-type="float" office:value="86.78" calcext:value-type="float">
            <text:p>$86.78</text:p>
          </table:table-cell>
          <table:table-cell table:formula="of:=SUMPRODUCT(([$Transactions.$C$3:.$C$102]=&quot;Utilities&quot;)*(MONTH([$Transactions.$A$3:.$A$102])=6)*[$Transactions.$E$3:.$E$102])" office:value-type="float" office:value="0" calcext:value-type="float">
            <text:p>$0.00</text:p>
          </table:table-cell>
          <table:table-cell table:formula="of:=SUMPRODUCT(([$Transactions.$C$3:.$C$102]=&quot;Utilities&quot;)*(MONTH([$Transactions.$A$3:.$A$102])=7)*[$Transactions.$E$3:.$E$102])" office:value-type="float" office:value="94.94" calcext:value-type="float">
            <text:p>$94.94</text:p>
          </table:table-cell>
          <table:table-cell table:formula="of:=SUMPRODUCT(([$Transactions.$C$3:.$C$102]=&quot;Utilities&quot;)*(MONTH([$Transactions.$A$3:.$A$102])=8)*[$Transactions.$E$3:.$E$102])" office:value-type="float" office:value="0" calcext:value-type="float">
            <text:p>$0.00</text:p>
          </table:table-cell>
          <table:table-cell table:formula="of:=SUMPRODUCT(([$Transactions.$C$3:.$C$102]=&quot;Utilities&quot;)*(MONTH([$Transactions.$A$3:.$A$102])=9)*[$Transactions.$E$3:.$E$102])" office:value-type="float" office:value="0" calcext:value-type="float">
            <text:p>$0.00</text:p>
          </table:table-cell>
          <table:table-cell table:formula="of:=SUMPRODUCT(([$Transactions.$C$3:.$C$102]=&quot;Utilities&quot;)*(MONTH([$Transactions.$A$3:.$A$102])=10)*[$Transactions.$E$3:.$E$102])" office:value-type="float" office:value="216.48" calcext:value-type="float">
            <text:p>$216.48</text:p>
          </table:table-cell>
          <table:table-cell table:formula="of:=SUMPRODUCT(([$Transactions.$C$3:.$C$102]=&quot;Utilities&quot;)*(MONTH([$Transactions.$A$3:.$A$102])=11)*[$Transactions.$E$3:.$E$102])" office:value-type="float" office:value="0" calcext:value-type="float">
            <text:p>$0.00</text:p>
          </table:table-cell>
          <table:table-cell table:formula="of:=SUMPRODUCT(([$Transactions.$C$3:.$C$102]=&quot;Utilities&quot;)*(MONTH([$Transactions.$A$3:.$A$102])=12)*[$Transactions.$E$3:.$E$102])" office:value-type="float" office:value="0" calcext:value-type="float">
            <text:p>$0.00</text:p>
          </table:table-cell>
          <table:table-cell table:formula="of:=SUM([.B13:.M13])" office:value-type="float" office:value="625.52" calcext:value-type="float">
            <text:p>$625.52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calcext:value-type="string">
            <text:p>Groceries</text:p>
          </table:table-cell>
          <table:table-cell table:formula="of:=SUMPRODUCT(([$Transactions.$C$3:.$C$102]=&quot;Groceries&quot;)*(MONTH([$Transactions.$A$3:.$A$102])=1)*[$Transactions.$E$3:.$E$102])" office:value-type="float" office:value="111.91" calcext:value-type="float">
            <text:p>$111.91</text:p>
          </table:table-cell>
          <table:table-cell table:formula="of:=SUMPRODUCT(([$Transactions.$C$3:.$C$102]=&quot;Groceries&quot;)*(MONTH([$Transactions.$A$3:.$A$102])=2)*[$Transactions.$E$3:.$E$102])" office:value-type="float" office:value="0" calcext:value-type="float">
            <text:p>$0.00</text:p>
          </table:table-cell>
          <table:table-cell table:formula="of:=SUMPRODUCT(([$Transactions.$C$3:.$C$102]=&quot;Groceries&quot;)*(MONTH([$Transactions.$A$3:.$A$102])=3)*[$Transactions.$E$3:.$E$102])" office:value-type="float" office:value="0" calcext:value-type="float">
            <text:p>$0.00</text:p>
          </table:table-cell>
          <table:table-cell table:formula="of:=SUMPRODUCT(([$Transactions.$C$3:.$C$102]=&quot;Groceries&quot;)*(MONTH([$Transactions.$A$3:.$A$102])=4)*[$Transactions.$E$3:.$E$102])" office:value-type="float" office:value="0" calcext:value-type="float">
            <text:p>$0.00</text:p>
          </table:table-cell>
          <table:table-cell table:formula="of:=SUMPRODUCT(([$Transactions.$C$3:.$C$102]=&quot;Groceries&quot;)*(MONTH([$Transactions.$A$3:.$A$102])=5)*[$Transactions.$E$3:.$E$102])" office:value-type="float" office:value="0" calcext:value-type="float">
            <text:p>$0.00</text:p>
          </table:table-cell>
          <table:table-cell table:formula="of:=SUMPRODUCT(([$Transactions.$C$3:.$C$102]=&quot;Groceries&quot;)*(MONTH([$Transactions.$A$3:.$A$102])=6)*[$Transactions.$E$3:.$E$102])" office:value-type="float" office:value="0" calcext:value-type="float">
            <text:p>$0.00</text:p>
          </table:table-cell>
          <table:table-cell table:formula="of:=SUMPRODUCT(([$Transactions.$C$3:.$C$102]=&quot;Groceries&quot;)*(MONTH([$Transactions.$A$3:.$A$102])=7)*[$Transactions.$E$3:.$E$102])" office:value-type="float" office:value="0" calcext:value-type="float">
            <text:p>$0.00</text:p>
          </table:table-cell>
          <table:table-cell table:formula="of:=SUMPRODUCT(([$Transactions.$C$3:.$C$102]=&quot;Groceries&quot;)*(MONTH([$Transactions.$A$3:.$A$102])=8)*[$Transactions.$E$3:.$E$102])" office:value-type="float" office:value="43.38" calcext:value-type="float">
            <text:p>$43.38</text:p>
          </table:table-cell>
          <table:table-cell table:formula="of:=SUMPRODUCT(([$Transactions.$C$3:.$C$102]=&quot;Groceries&quot;)*(MONTH([$Transactions.$A$3:.$A$102])=9)*[$Transactions.$E$3:.$E$102])" office:value-type="float" office:value="0" calcext:value-type="float">
            <text:p>$0.00</text:p>
          </table:table-cell>
          <table:table-cell table:formula="of:=SUMPRODUCT(([$Transactions.$C$3:.$C$102]=&quot;Groceries&quot;)*(MONTH([$Transactions.$A$3:.$A$102])=10)*[$Transactions.$E$3:.$E$102])" office:value-type="float" office:value="0" calcext:value-type="float">
            <text:p>$0.00</text:p>
          </table:table-cell>
          <table:table-cell table:formula="of:=SUMPRODUCT(([$Transactions.$C$3:.$C$102]=&quot;Groceries&quot;)*(MONTH([$Transactions.$A$3:.$A$102])=11)*[$Transactions.$E$3:.$E$102])" office:value-type="float" office:value="48.95" calcext:value-type="float">
            <text:p>$48.95</text:p>
          </table:table-cell>
          <table:table-cell table:formula="of:=SUMPRODUCT(([$Transactions.$C$3:.$C$102]=&quot;Groceries&quot;)*(MONTH([$Transactions.$A$3:.$A$102])=12)*[$Transactions.$E$3:.$E$102])" office:value-type="float" office:value="0" calcext:value-type="float">
            <text:p>$0.00</text:p>
          </table:table-cell>
          <table:table-cell table:formula="of:=SUM([.B14:.M14])" office:value-type="float" office:value="204.24" calcext:value-type="float">
            <text:p>$204.24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calcext:value-type="string">
            <text:p>Transportation</text:p>
          </table:table-cell>
          <table:table-cell table:formula="of:=SUMPRODUCT(([$Transactions.$C$3:.$C$102]=&quot;Transportation&quot;)*(MONTH([$Transactions.$A$3:.$A$102])=1)*[$Transactions.$E$3:.$E$102])" office:value-type="float" office:value="0" calcext:value-type="float">
            <text:p>$0.00</text:p>
          </table:table-cell>
          <table:table-cell table:formula="of:=SUMPRODUCT(([$Transactions.$C$3:.$C$102]=&quot;Transportation&quot;)*(MONTH([$Transactions.$A$3:.$A$102])=2)*[$Transactions.$E$3:.$E$102])" office:value-type="float" office:value="0" calcext:value-type="float">
            <text:p>$0.00</text:p>
          </table:table-cell>
          <table:table-cell table:formula="of:=SUMPRODUCT(([$Transactions.$C$3:.$C$102]=&quot;Transportation&quot;)*(MONTH([$Transactions.$A$3:.$A$102])=3)*[$Transactions.$E$3:.$E$102])" office:value-type="float" office:value="0" calcext:value-type="float">
            <text:p>$0.00</text:p>
          </table:table-cell>
          <table:table-cell table:formula="of:=SUMPRODUCT(([$Transactions.$C$3:.$C$102]=&quot;Transportation&quot;)*(MONTH([$Transactions.$A$3:.$A$102])=4)*[$Transactions.$E$3:.$E$102])" office:value-type="float" office:value="0" calcext:value-type="float">
            <text:p>$0.00</text:p>
          </table:table-cell>
          <table:table-cell table:formula="of:=SUMPRODUCT(([$Transactions.$C$3:.$C$102]=&quot;Transportation&quot;)*(MONTH([$Transactions.$A$3:.$A$102])=5)*[$Transactions.$E$3:.$E$102])" office:value-type="float" office:value="100.13" calcext:value-type="float">
            <text:p>$100.13</text:p>
          </table:table-cell>
          <table:table-cell table:formula="of:=SUMPRODUCT(([$Transactions.$C$3:.$C$102]=&quot;Transportation&quot;)*(MONTH([$Transactions.$A$3:.$A$102])=6)*[$Transactions.$E$3:.$E$102])" office:value-type="float" office:value="6.73" calcext:value-type="float">
            <text:p>$6.73</text:p>
          </table:table-cell>
          <table:table-cell table:formula="of:=SUMPRODUCT(([$Transactions.$C$3:.$C$102]=&quot;Transportation&quot;)*(MONTH([$Transactions.$A$3:.$A$102])=7)*[$Transactions.$E$3:.$E$102])" office:value-type="float" office:value="134.55" calcext:value-type="float">
            <text:p>$134.55</text:p>
          </table:table-cell>
          <table:table-cell table:formula="of:=SUMPRODUCT(([$Transactions.$C$3:.$C$102]=&quot;Transportation&quot;)*(MONTH([$Transactions.$A$3:.$A$102])=8)*[$Transactions.$E$3:.$E$102])" office:value-type="float" office:value="0" calcext:value-type="float">
            <text:p>$0.00</text:p>
          </table:table-cell>
          <table:table-cell table:formula="of:=SUMPRODUCT(([$Transactions.$C$3:.$C$102]=&quot;Transportation&quot;)*(MONTH([$Transactions.$A$3:.$A$102])=9)*[$Transactions.$E$3:.$E$102])" office:value-type="float" office:value="115.68" calcext:value-type="float">
            <text:p>$115.68</text:p>
          </table:table-cell>
          <table:table-cell table:formula="of:=SUMPRODUCT(([$Transactions.$C$3:.$C$102]=&quot;Transportation&quot;)*(MONTH([$Transactions.$A$3:.$A$102])=10)*[$Transactions.$E$3:.$E$102])" office:value-type="float" office:value="0" calcext:value-type="float">
            <text:p>$0.00</text:p>
          </table:table-cell>
          <table:table-cell table:formula="of:=SUMPRODUCT(([$Transactions.$C$3:.$C$102]=&quot;Transportation&quot;)*(MONTH([$Transactions.$A$3:.$A$102])=11)*[$Transactions.$E$3:.$E$102])" office:value-type="float" office:value="33.22" calcext:value-type="float">
            <text:p>$33.22</text:p>
          </table:table-cell>
          <table:table-cell table:formula="of:=SUMPRODUCT(([$Transactions.$C$3:.$C$102]=&quot;Transportation&quot;)*(MONTH([$Transactions.$A$3:.$A$102])=12)*[$Transactions.$E$3:.$E$102])" office:value-type="float" office:value="0" calcext:value-type="float">
            <text:p>$0.00</text:p>
          </table:table-cell>
          <table:table-cell table:formula="of:=SUM([.B15:.M15])" office:value-type="float" office:value="390.31" calcext:value-type="float">
            <text:p>$390.31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calcext:value-type="string">
            <text:p>Insurance</text:p>
          </table:table-cell>
          <table:table-cell table:formula="of:=SUMPRODUCT(([$Transactions.$C$3:.$C$102]=&quot;Insurance&quot;)*(MONTH([$Transactions.$A$3:.$A$102])=1)*[$Transactions.$E$3:.$E$102])" office:value-type="float" office:value="0" calcext:value-type="float">
            <text:p>$0.00</text:p>
          </table:table-cell>
          <table:table-cell table:formula="of:=SUMPRODUCT(([$Transactions.$C$3:.$C$102]=&quot;Insurance&quot;)*(MONTH([$Transactions.$A$3:.$A$102])=2)*[$Transactions.$E$3:.$E$102])" office:value-type="float" office:value="0" calcext:value-type="float">
            <text:p>$0.00</text:p>
          </table:table-cell>
          <table:table-cell table:formula="of:=SUMPRODUCT(([$Transactions.$C$3:.$C$102]=&quot;Insurance&quot;)*(MONTH([$Transactions.$A$3:.$A$102])=3)*[$Transactions.$E$3:.$E$102])" office:value-type="float" office:value="313.37" calcext:value-type="float">
            <text:p>$313.37</text:p>
          </table:table-cell>
          <table:table-cell table:formula="of:=SUMPRODUCT(([$Transactions.$C$3:.$C$102]=&quot;Insurance&quot;)*(MONTH([$Transactions.$A$3:.$A$102])=4)*[$Transactions.$E$3:.$E$102])" office:value-type="float" office:value="339.99" calcext:value-type="float">
            <text:p>$339.99</text:p>
          </table:table-cell>
          <table:table-cell table:formula="of:=SUMPRODUCT(([$Transactions.$C$3:.$C$102]=&quot;Insurance&quot;)*(MONTH([$Transactions.$A$3:.$A$102])=5)*[$Transactions.$E$3:.$E$102])" office:value-type="float" office:value="266.47" calcext:value-type="float">
            <text:p>$266.47</text:p>
          </table:table-cell>
          <table:table-cell table:formula="of:=SUMPRODUCT(([$Transactions.$C$3:.$C$102]=&quot;Insurance&quot;)*(MONTH([$Transactions.$A$3:.$A$102])=6)*[$Transactions.$E$3:.$E$102])" office:value-type="float" office:value="0" calcext:value-type="float">
            <text:p>$0.00</text:p>
          </table:table-cell>
          <table:table-cell table:formula="of:=SUMPRODUCT(([$Transactions.$C$3:.$C$102]=&quot;Insurance&quot;)*(MONTH([$Transactions.$A$3:.$A$102])=7)*[$Transactions.$E$3:.$E$102])" office:value-type="float" office:value="0" calcext:value-type="float">
            <text:p>$0.00</text:p>
          </table:table-cell>
          <table:table-cell table:formula="of:=SUMPRODUCT(([$Transactions.$C$3:.$C$102]=&quot;Insurance&quot;)*(MONTH([$Transactions.$A$3:.$A$102])=8)*[$Transactions.$E$3:.$E$102])" office:value-type="float" office:value="0" calcext:value-type="float">
            <text:p>$0.00</text:p>
          </table:table-cell>
          <table:table-cell table:formula="of:=SUMPRODUCT(([$Transactions.$C$3:.$C$102]=&quot;Insurance&quot;)*(MONTH([$Transactions.$A$3:.$A$102])=9)*[$Transactions.$E$3:.$E$102])" office:value-type="float" office:value="0" calcext:value-type="float">
            <text:p>$0.00</text:p>
          </table:table-cell>
          <table:table-cell table:formula="of:=SUMPRODUCT(([$Transactions.$C$3:.$C$102]=&quot;Insurance&quot;)*(MONTH([$Transactions.$A$3:.$A$102])=10)*[$Transactions.$E$3:.$E$102])" office:value-type="float" office:value="208.53" calcext:value-type="float">
            <text:p>$208.53</text:p>
          </table:table-cell>
          <table:table-cell table:formula="of:=SUMPRODUCT(([$Transactions.$C$3:.$C$102]=&quot;Insurance&quot;)*(MONTH([$Transactions.$A$3:.$A$102])=11)*[$Transactions.$E$3:.$E$102])" office:value-type="float" office:value="0" calcext:value-type="float">
            <text:p>$0.00</text:p>
          </table:table-cell>
          <table:table-cell table:formula="of:=SUMPRODUCT(([$Transactions.$C$3:.$C$102]=&quot;Insurance&quot;)*(MONTH([$Transactions.$A$3:.$A$102])=12)*[$Transactions.$E$3:.$E$102])" office:value-type="float" office:value="0" calcext:value-type="float">
            <text:p>$0.00</text:p>
          </table:table-cell>
          <table:table-cell table:formula="of:=SUM([.B16:.M16])" office:value-type="float" office:value="1128.36" calcext:value-type="float">
            <text:p>$1,128.36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calcext:value-type="string">
            <text:p>Healthcare</text:p>
          </table:table-cell>
          <table:table-cell table:formula="of:=SUMPRODUCT(([$Transactions.$C$3:.$C$102]=&quot;Healthcare&quot;)*(MONTH([$Transactions.$A$3:.$A$102])=1)*[$Transactions.$E$3:.$E$102])" office:value-type="float" office:value="0" calcext:value-type="float">
            <text:p>$0.00</text:p>
          </table:table-cell>
          <table:table-cell table:formula="of:=SUMPRODUCT(([$Transactions.$C$3:.$C$102]=&quot;Healthcare&quot;)*(MONTH([$Transactions.$A$3:.$A$102])=2)*[$Transactions.$E$3:.$E$102])" office:value-type="float" office:value="0" calcext:value-type="float">
            <text:p>$0.00</text:p>
          </table:table-cell>
          <table:table-cell table:formula="of:=SUMPRODUCT(([$Transactions.$C$3:.$C$102]=&quot;Healthcare&quot;)*(MONTH([$Transactions.$A$3:.$A$102])=3)*[$Transactions.$E$3:.$E$102])" office:value-type="float" office:value="141.85" calcext:value-type="float">
            <text:p>$141.85</text:p>
          </table:table-cell>
          <table:table-cell table:formula="of:=SUMPRODUCT(([$Transactions.$C$3:.$C$102]=&quot;Healthcare&quot;)*(MONTH([$Transactions.$A$3:.$A$102])=4)*[$Transactions.$E$3:.$E$102])" office:value-type="float" office:value="26.88" calcext:value-type="float">
            <text:p>$26.88</text:p>
          </table:table-cell>
          <table:table-cell table:formula="of:=SUMPRODUCT(([$Transactions.$C$3:.$C$102]=&quot;Healthcare&quot;)*(MONTH([$Transactions.$A$3:.$A$102])=5)*[$Transactions.$E$3:.$E$102])" office:value-type="float" office:value="0" calcext:value-type="float">
            <text:p>$0.00</text:p>
          </table:table-cell>
          <table:table-cell table:formula="of:=SUMPRODUCT(([$Transactions.$C$3:.$C$102]=&quot;Healthcare&quot;)*(MONTH([$Transactions.$A$3:.$A$102])=6)*[$Transactions.$E$3:.$E$102])" office:value-type="float" office:value="0" calcext:value-type="float">
            <text:p>$0.00</text:p>
          </table:table-cell>
          <table:table-cell table:formula="of:=SUMPRODUCT(([$Transactions.$C$3:.$C$102]=&quot;Healthcare&quot;)*(MONTH([$Transactions.$A$3:.$A$102])=7)*[$Transactions.$E$3:.$E$102])" office:value-type="float" office:value="27.19" calcext:value-type="float">
            <text:p>$27.19</text:p>
          </table:table-cell>
          <table:table-cell table:formula="of:=SUMPRODUCT(([$Transactions.$C$3:.$C$102]=&quot;Healthcare&quot;)*(MONTH([$Transactions.$A$3:.$A$102])=8)*[$Transactions.$E$3:.$E$102])" office:value-type="float" office:value="167.3" calcext:value-type="float">
            <text:p>$167.30</text:p>
          </table:table-cell>
          <table:table-cell table:formula="of:=SUMPRODUCT(([$Transactions.$C$3:.$C$102]=&quot;Healthcare&quot;)*(MONTH([$Transactions.$A$3:.$A$102])=9)*[$Transactions.$E$3:.$E$102])" office:value-type="float" office:value="0" calcext:value-type="float">
            <text:p>$0.00</text:p>
          </table:table-cell>
          <table:table-cell table:formula="of:=SUMPRODUCT(([$Transactions.$C$3:.$C$102]=&quot;Healthcare&quot;)*(MONTH([$Transactions.$A$3:.$A$102])=10)*[$Transactions.$E$3:.$E$102])" office:value-type="float" office:value="41.38" calcext:value-type="float">
            <text:p>$41.38</text:p>
          </table:table-cell>
          <table:table-cell table:formula="of:=SUMPRODUCT(([$Transactions.$C$3:.$C$102]=&quot;Healthcare&quot;)*(MONTH([$Transactions.$A$3:.$A$102])=11)*[$Transactions.$E$3:.$E$102])" office:value-type="float" office:value="0" calcext:value-type="float">
            <text:p>$0.00</text:p>
          </table:table-cell>
          <table:table-cell table:formula="of:=SUMPRODUCT(([$Transactions.$C$3:.$C$102]=&quot;Healthcare&quot;)*(MONTH([$Transactions.$A$3:.$A$102])=12)*[$Transactions.$E$3:.$E$102])" office:value-type="float" office:value="131.71" calcext:value-type="float">
            <text:p>$131.71</text:p>
          </table:table-cell>
          <table:table-cell table:formula="of:=SUM([.B17:.M17])" office:value-type="float" office:value="536.31" calcext:value-type="float">
            <text:p>$536.31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calcext:value-type="string">
            <text:p>Dining Out</text:p>
          </table:table-cell>
          <table:table-cell table:formula="of:=SUMPRODUCT(([$Transactions.$C$3:.$C$102]=&quot;Dining Out&quot;)*(MONTH([$Transactions.$A$3:.$A$102])=1)*[$Transactions.$E$3:.$E$102])" office:value-type="float" office:value="10.88" calcext:value-type="float">
            <text:p>$10.88</text:p>
          </table:table-cell>
          <table:table-cell table:formula="of:=SUMPRODUCT(([$Transactions.$C$3:.$C$102]=&quot;Dining Out&quot;)*(MONTH([$Transactions.$A$3:.$A$102])=2)*[$Transactions.$E$3:.$E$102])" office:value-type="float" office:value="0" calcext:value-type="float">
            <text:p>$0.00</text:p>
          </table:table-cell>
          <table:table-cell table:formula="of:=SUMPRODUCT(([$Transactions.$C$3:.$C$102]=&quot;Dining Out&quot;)*(MONTH([$Transactions.$A$3:.$A$102])=3)*[$Transactions.$E$3:.$E$102])" office:value-type="float" office:value="9.94" calcext:value-type="float">
            <text:p>$9.94</text:p>
          </table:table-cell>
          <table:table-cell table:formula="of:=SUMPRODUCT(([$Transactions.$C$3:.$C$102]=&quot;Dining Out&quot;)*(MONTH([$Transactions.$A$3:.$A$102])=4)*[$Transactions.$E$3:.$E$102])" office:value-type="float" office:value="0" calcext:value-type="float">
            <text:p>$0.00</text:p>
          </table:table-cell>
          <table:table-cell table:formula="of:=SUMPRODUCT(([$Transactions.$C$3:.$C$102]=&quot;Dining Out&quot;)*(MONTH([$Transactions.$A$3:.$A$102])=5)*[$Transactions.$E$3:.$E$102])" office:value-type="float" office:value="0" calcext:value-type="float">
            <text:p>$0.00</text:p>
          </table:table-cell>
          <table:table-cell table:formula="of:=SUMPRODUCT(([$Transactions.$C$3:.$C$102]=&quot;Dining Out&quot;)*(MONTH([$Transactions.$A$3:.$A$102])=6)*[$Transactions.$E$3:.$E$102])" office:value-type="float" office:value="0" calcext:value-type="float">
            <text:p>$0.00</text:p>
          </table:table-cell>
          <table:table-cell table:formula="of:=SUMPRODUCT(([$Transactions.$C$3:.$C$102]=&quot;Dining Out&quot;)*(MONTH([$Transactions.$A$3:.$A$102])=7)*[$Transactions.$E$3:.$E$102])" office:value-type="float" office:value="0" calcext:value-type="float">
            <text:p>$0.00</text:p>
          </table:table-cell>
          <table:table-cell table:formula="of:=SUMPRODUCT(([$Transactions.$C$3:.$C$102]=&quot;Dining Out&quot;)*(MONTH([$Transactions.$A$3:.$A$102])=8)*[$Transactions.$E$3:.$E$102])" office:value-type="float" office:value="39.49" calcext:value-type="float">
            <text:p>$39.49</text:p>
          </table:table-cell>
          <table:table-cell table:formula="of:=SUMPRODUCT(([$Transactions.$C$3:.$C$102]=&quot;Dining Out&quot;)*(MONTH([$Transactions.$A$3:.$A$102])=9)*[$Transactions.$E$3:.$E$102])" office:value-type="float" office:value="8.74" calcext:value-type="float">
            <text:p>$8.74</text:p>
          </table:table-cell>
          <table:table-cell table:formula="of:=SUMPRODUCT(([$Transactions.$C$3:.$C$102]=&quot;Dining Out&quot;)*(MONTH([$Transactions.$A$3:.$A$102])=10)*[$Transactions.$E$3:.$E$102])" office:value-type="float" office:value="0" calcext:value-type="float">
            <text:p>$0.00</text:p>
          </table:table-cell>
          <table:table-cell table:formula="of:=SUMPRODUCT(([$Transactions.$C$3:.$C$102]=&quot;Dining Out&quot;)*(MONTH([$Transactions.$A$3:.$A$102])=11)*[$Transactions.$E$3:.$E$102])" office:value-type="float" office:value="0" calcext:value-type="float">
            <text:p>$0.00</text:p>
          </table:table-cell>
          <table:table-cell table:formula="of:=SUMPRODUCT(([$Transactions.$C$3:.$C$102]=&quot;Dining Out&quot;)*(MONTH([$Transactions.$A$3:.$A$102])=12)*[$Transactions.$E$3:.$E$102])" office:value-type="float" office:value="52.83" calcext:value-type="float">
            <text:p>$52.83</text:p>
          </table:table-cell>
          <table:table-cell table:formula="of:=SUM([.B18:.M18])" office:value-type="float" office:value="121.88" calcext:value-type="float">
            <text:p>$121.88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calcext:value-type="string">
            <text:p>Entertainment</text:p>
          </table:table-cell>
          <table:table-cell table:formula="of:=SUMPRODUCT(([$Transactions.$C$3:.$C$102]=&quot;Entertainment&quot;)*(MONTH([$Transactions.$A$3:.$A$102])=1)*[$Transactions.$E$3:.$E$102])" office:value-type="float" office:value="37.36" calcext:value-type="float">
            <text:p>$37.36</text:p>
          </table:table-cell>
          <table:table-cell table:formula="of:=SUMPRODUCT(([$Transactions.$C$3:.$C$102]=&quot;Entertainment&quot;)*(MONTH([$Transactions.$A$3:.$A$102])=2)*[$Transactions.$E$3:.$E$102])" office:value-type="float" office:value="72.3" calcext:value-type="float">
            <text:p>$72.30</text:p>
          </table:table-cell>
          <table:table-cell table:formula="of:=SUMPRODUCT(([$Transactions.$C$3:.$C$102]=&quot;Entertainment&quot;)*(MONTH([$Transactions.$A$3:.$A$102])=3)*[$Transactions.$E$3:.$E$102])" office:value-type="float" office:value="12.78" calcext:value-type="float">
            <text:p>$12.78</text:p>
          </table:table-cell>
          <table:table-cell table:formula="of:=SUMPRODUCT(([$Transactions.$C$3:.$C$102]=&quot;Entertainment&quot;)*(MONTH([$Transactions.$A$3:.$A$102])=4)*[$Transactions.$E$3:.$E$102])" office:value-type="float" office:value="45.81" calcext:value-type="float">
            <text:p>$45.81</text:p>
          </table:table-cell>
          <table:table-cell table:formula="of:=SUMPRODUCT(([$Transactions.$C$3:.$C$102]=&quot;Entertainment&quot;)*(MONTH([$Transactions.$A$3:.$A$102])=5)*[$Transactions.$E$3:.$E$102])" office:value-type="float" office:value="83.14" calcext:value-type="float">
            <text:p>$83.14</text:p>
          </table:table-cell>
          <table:table-cell table:formula="of:=SUMPRODUCT(([$Transactions.$C$3:.$C$102]=&quot;Entertainment&quot;)*(MONTH([$Transactions.$A$3:.$A$102])=6)*[$Transactions.$E$3:.$E$102])" office:value-type="float" office:value="0" calcext:value-type="float">
            <text:p>$0.00</text:p>
          </table:table-cell>
          <table:table-cell table:formula="of:=SUMPRODUCT(([$Transactions.$C$3:.$C$102]=&quot;Entertainment&quot;)*(MONTH([$Transactions.$A$3:.$A$102])=7)*[$Transactions.$E$3:.$E$102])" office:value-type="float" office:value="0" calcext:value-type="float">
            <text:p>$0.00</text:p>
          </table:table-cell>
          <table:table-cell table:formula="of:=SUMPRODUCT(([$Transactions.$C$3:.$C$102]=&quot;Entertainment&quot;)*(MONTH([$Transactions.$A$3:.$A$102])=8)*[$Transactions.$E$3:.$E$102])" office:value-type="float" office:value="19.35" calcext:value-type="float">
            <text:p>$19.35</text:p>
          </table:table-cell>
          <table:table-cell table:formula="of:=SUMPRODUCT(([$Transactions.$C$3:.$C$102]=&quot;Entertainment&quot;)*(MONTH([$Transactions.$A$3:.$A$102])=9)*[$Transactions.$E$3:.$E$102])" office:value-type="float" office:value="0" calcext:value-type="float">
            <text:p>$0.00</text:p>
          </table:table-cell>
          <table:table-cell table:formula="of:=SUMPRODUCT(([$Transactions.$C$3:.$C$102]=&quot;Entertainment&quot;)*(MONTH([$Transactions.$A$3:.$A$102])=10)*[$Transactions.$E$3:.$E$102])" office:value-type="float" office:value="0" calcext:value-type="float">
            <text:p>$0.00</text:p>
          </table:table-cell>
          <table:table-cell table:formula="of:=SUMPRODUCT(([$Transactions.$C$3:.$C$102]=&quot;Entertainment&quot;)*(MONTH([$Transactions.$A$3:.$A$102])=11)*[$Transactions.$E$3:.$E$102])" office:value-type="float" office:value="119.69" calcext:value-type="float">
            <text:p>$119.69</text:p>
          </table:table-cell>
          <table:table-cell table:formula="of:=SUMPRODUCT(([$Transactions.$C$3:.$C$102]=&quot;Entertainment&quot;)*(MONTH([$Transactions.$A$3:.$A$102])=12)*[$Transactions.$E$3:.$E$102])" office:value-type="float" office:value="0" calcext:value-type="float">
            <text:p>$0.00</text:p>
          </table:table-cell>
          <table:table-cell table:formula="of:=SUM([.B19:.M19])" office:value-type="float" office:value="390.43" calcext:value-type="float">
            <text:p>$390.43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calcext:value-type="string">
            <text:p>Clothing</text:p>
          </table:table-cell>
          <table:table-cell table:formula="of:=SUMPRODUCT(([$Transactions.$C$3:.$C$102]=&quot;Clothing&quot;)*(MONTH([$Transactions.$A$3:.$A$102])=1)*[$Transactions.$E$3:.$E$102])" office:value-type="float" office:value="49.99" calcext:value-type="float">
            <text:p>$49.99</text:p>
          </table:table-cell>
          <table:table-cell table:formula="of:=SUMPRODUCT(([$Transactions.$C$3:.$C$102]=&quot;Clothing&quot;)*(MONTH([$Transactions.$A$3:.$A$102])=2)*[$Transactions.$E$3:.$E$102])" office:value-type="float" office:value="0" calcext:value-type="float">
            <text:p>$0.00</text:p>
          </table:table-cell>
          <table:table-cell table:formula="of:=SUMPRODUCT(([$Transactions.$C$3:.$C$102]=&quot;Clothing&quot;)*(MONTH([$Transactions.$A$3:.$A$102])=3)*[$Transactions.$E$3:.$E$102])" office:value-type="float" office:value="99.25" calcext:value-type="float">
            <text:p>$99.25</text:p>
          </table:table-cell>
          <table:table-cell table:formula="of:=SUMPRODUCT(([$Transactions.$C$3:.$C$102]=&quot;Clothing&quot;)*(MONTH([$Transactions.$A$3:.$A$102])=4)*[$Transactions.$E$3:.$E$102])" office:value-type="float" office:value="0" calcext:value-type="float">
            <text:p>$0.00</text:p>
          </table:table-cell>
          <table:table-cell table:formula="of:=SUMPRODUCT(([$Transactions.$C$3:.$C$102]=&quot;Clothing&quot;)*(MONTH([$Transactions.$A$3:.$A$102])=5)*[$Transactions.$E$3:.$E$102])" office:value-type="float" office:value="0" calcext:value-type="float">
            <text:p>$0.00</text:p>
          </table:table-cell>
          <table:table-cell table:formula="of:=SUMPRODUCT(([$Transactions.$C$3:.$C$102]=&quot;Clothing&quot;)*(MONTH([$Transactions.$A$3:.$A$102])=6)*[$Transactions.$E$3:.$E$102])" office:value-type="float" office:value="85.17" calcext:value-type="float">
            <text:p>$85.17</text:p>
          </table:table-cell>
          <table:table-cell table:formula="of:=SUMPRODUCT(([$Transactions.$C$3:.$C$102]=&quot;Clothing&quot;)*(MONTH([$Transactions.$A$3:.$A$102])=7)*[$Transactions.$E$3:.$E$102])" office:value-type="float" office:value="0" calcext:value-type="float">
            <text:p>$0.00</text:p>
          </table:table-cell>
          <table:table-cell table:formula="of:=SUMPRODUCT(([$Transactions.$C$3:.$C$102]=&quot;Clothing&quot;)*(MONTH([$Transactions.$A$3:.$A$102])=8)*[$Transactions.$E$3:.$E$102])" office:value-type="float" office:value="0" calcext:value-type="float">
            <text:p>$0.00</text:p>
          </table:table-cell>
          <table:table-cell table:formula="of:=SUMPRODUCT(([$Transactions.$C$3:.$C$102]=&quot;Clothing&quot;)*(MONTH([$Transactions.$A$3:.$A$102])=9)*[$Transactions.$E$3:.$E$102])" office:value-type="float" office:value="0" calcext:value-type="float">
            <text:p>$0.00</text:p>
          </table:table-cell>
          <table:table-cell table:formula="of:=SUMPRODUCT(([$Transactions.$C$3:.$C$102]=&quot;Clothing&quot;)*(MONTH([$Transactions.$A$3:.$A$102])=10)*[$Transactions.$E$3:.$E$102])" office:value-type="float" office:value="67.21" calcext:value-type="float">
            <text:p>$67.21</text:p>
          </table:table-cell>
          <table:table-cell table:formula="of:=SUMPRODUCT(([$Transactions.$C$3:.$C$102]=&quot;Clothing&quot;)*(MONTH([$Transactions.$A$3:.$A$102])=11)*[$Transactions.$E$3:.$E$102])" office:value-type="float" office:value="0" calcext:value-type="float">
            <text:p>$0.00</text:p>
          </table:table-cell>
          <table:table-cell table:formula="of:=SUMPRODUCT(([$Transactions.$C$3:.$C$102]=&quot;Clothing&quot;)*(MONTH([$Transactions.$A$3:.$A$102])=12)*[$Transactions.$E$3:.$E$102])" office:value-type="float" office:value="0" calcext:value-type="float">
            <text:p>$0.00</text:p>
          </table:table-cell>
          <table:table-cell table:formula="of:=SUM([.B20:.M20])" office:value-type="float" office:value="301.62" calcext:value-type="float">
            <text:p>$301.62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calcext:value-type="string">
            <text:p>Subscriptions</text:p>
          </table:table-cell>
          <table:table-cell table:formula="of:=SUMPRODUCT(([$Transactions.$C$3:.$C$102]=&quot;Subscriptions&quot;)*(MONTH([$Transactions.$A$3:.$A$102])=1)*[$Transactions.$E$3:.$E$102])" office:value-type="float" office:value="25" calcext:value-type="float">
            <text:p>$25.00</text:p>
          </table:table-cell>
          <table:table-cell table:formula="of:=SUMPRODUCT(([$Transactions.$C$3:.$C$102]=&quot;Subscriptions&quot;)*(MONTH([$Transactions.$A$3:.$A$102])=2)*[$Transactions.$E$3:.$E$102])" office:value-type="float" office:value="15" calcext:value-type="float">
            <text:p>$15.00</text:p>
          </table:table-cell>
          <table:table-cell table:formula="of:=SUMPRODUCT(([$Transactions.$C$3:.$C$102]=&quot;Subscriptions&quot;)*(MONTH([$Transactions.$A$3:.$A$102])=3)*[$Transactions.$E$3:.$E$102])" office:value-type="float" office:value="0" calcext:value-type="float">
            <text:p>$0.00</text:p>
          </table:table-cell>
          <table:table-cell table:formula="of:=SUMPRODUCT(([$Transactions.$C$3:.$C$102]=&quot;Subscriptions&quot;)*(MONTH([$Transactions.$A$3:.$A$102])=4)*[$Transactions.$E$3:.$E$102])" office:value-type="float" office:value="0" calcext:value-type="float">
            <text:p>$0.00</text:p>
          </table:table-cell>
          <table:table-cell table:formula="of:=SUMPRODUCT(([$Transactions.$C$3:.$C$102]=&quot;Subscriptions&quot;)*(MONTH([$Transactions.$A$3:.$A$102])=5)*[$Transactions.$E$3:.$E$102])" office:value-type="float" office:value="0" calcext:value-type="float">
            <text:p>$0.00</text:p>
          </table:table-cell>
          <table:table-cell table:formula="of:=SUMPRODUCT(([$Transactions.$C$3:.$C$102]=&quot;Subscriptions&quot;)*(MONTH([$Transactions.$A$3:.$A$102])=6)*[$Transactions.$E$3:.$E$102])" office:value-type="float" office:value="15" calcext:value-type="float">
            <text:p>$15.00</text:p>
          </table:table-cell>
          <table:table-cell table:formula="of:=SUMPRODUCT(([$Transactions.$C$3:.$C$102]=&quot;Subscriptions&quot;)*(MONTH([$Transactions.$A$3:.$A$102])=7)*[$Transactions.$E$3:.$E$102])" office:value-type="float" office:value="0" calcext:value-type="float">
            <text:p>$0.00</text:p>
          </table:table-cell>
          <table:table-cell table:formula="of:=SUMPRODUCT(([$Transactions.$C$3:.$C$102]=&quot;Subscriptions&quot;)*(MONTH([$Transactions.$A$3:.$A$102])=8)*[$Transactions.$E$3:.$E$102])" office:value-type="float" office:value="29" calcext:value-type="float">
            <text:p>$29.00</text:p>
          </table:table-cell>
          <table:table-cell table:formula="of:=SUMPRODUCT(([$Transactions.$C$3:.$C$102]=&quot;Subscriptions&quot;)*(MONTH([$Transactions.$A$3:.$A$102])=9)*[$Transactions.$E$3:.$E$102])" office:value-type="float" office:value="10" calcext:value-type="float">
            <text:p>$10.00</text:p>
          </table:table-cell>
          <table:table-cell table:formula="of:=SUMPRODUCT(([$Transactions.$C$3:.$C$102]=&quot;Subscriptions&quot;)*(MONTH([$Transactions.$A$3:.$A$102])=10)*[$Transactions.$E$3:.$E$102])" office:value-type="float" office:value="0" calcext:value-type="float">
            <text:p>$0.00</text:p>
          </table:table-cell>
          <table:table-cell table:formula="of:=SUMPRODUCT(([$Transactions.$C$3:.$C$102]=&quot;Subscriptions&quot;)*(MONTH([$Transactions.$A$3:.$A$102])=11)*[$Transactions.$E$3:.$E$102])" office:value-type="float" office:value="0" calcext:value-type="float">
            <text:p>$0.00</text:p>
          </table:table-cell>
          <table:table-cell table:formula="of:=SUMPRODUCT(([$Transactions.$C$3:.$C$102]=&quot;Subscriptions&quot;)*(MONTH([$Transactions.$A$3:.$A$102])=12)*[$Transactions.$E$3:.$E$102])" office:value-type="float" office:value="0" calcext:value-type="float">
            <text:p>$0.00</text:p>
          </table:table-cell>
          <table:table-cell table:formula="of:=SUM([.B21:.M21])" office:value-type="float" office:value="94" calcext:value-type="float">
            <text:p>$94.00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calcext:value-type="string">
            <text:p>Savings/Investments</text:p>
          </table:table-cell>
          <table:table-cell table:formula="of:=SUMPRODUCT(([$Transactions.$C$3:.$C$102]=&quot;Savings/Investments&quot;)*(MONTH([$Transactions.$A$3:.$A$102])=1)*[$Transactions.$E$3:.$E$102])" office:value-type="float" office:value="0" calcext:value-type="float">
            <text:p>$0.00</text:p>
          </table:table-cell>
          <table:table-cell table:formula="of:=SUMPRODUCT(([$Transactions.$C$3:.$C$102]=&quot;Savings/Investments&quot;)*(MONTH([$Transactions.$A$3:.$A$102])=2)*[$Transactions.$E$3:.$E$102])" office:value-type="float" office:value="269" calcext:value-type="float">
            <text:p>$269.00</text:p>
          </table:table-cell>
          <table:table-cell table:formula="of:=SUMPRODUCT(([$Transactions.$C$3:.$C$102]=&quot;Savings/Investments&quot;)*(MONTH([$Transactions.$A$3:.$A$102])=3)*[$Transactions.$E$3:.$E$102])" office:value-type="float" office:value="272.92" calcext:value-type="float">
            <text:p>$272.92</text:p>
          </table:table-cell>
          <table:table-cell table:formula="of:=SUMPRODUCT(([$Transactions.$C$3:.$C$102]=&quot;Savings/Investments&quot;)*(MONTH([$Transactions.$A$3:.$A$102])=4)*[$Transactions.$E$3:.$E$102])" office:value-type="float" office:value="135.87" calcext:value-type="float">
            <text:p>$135.87</text:p>
          </table:table-cell>
          <table:table-cell table:formula="of:=SUMPRODUCT(([$Transactions.$C$3:.$C$102]=&quot;Savings/Investments&quot;)*(MONTH([$Transactions.$A$3:.$A$102])=5)*[$Transactions.$E$3:.$E$102])" office:value-type="float" office:value="235.59" calcext:value-type="float">
            <text:p>$235.59</text:p>
          </table:table-cell>
          <table:table-cell table:formula="of:=SUMPRODUCT(([$Transactions.$C$3:.$C$102]=&quot;Savings/Investments&quot;)*(MONTH([$Transactions.$A$3:.$A$102])=6)*[$Transactions.$E$3:.$E$102])" office:value-type="float" office:value="0" calcext:value-type="float">
            <text:p>$0.00</text:p>
          </table:table-cell>
          <table:table-cell table:formula="of:=SUMPRODUCT(([$Transactions.$C$3:.$C$102]=&quot;Savings/Investments&quot;)*(MONTH([$Transactions.$A$3:.$A$102])=7)*[$Transactions.$E$3:.$E$102])" office:value-type="float" office:value="261.71" calcext:value-type="float">
            <text:p>$261.71</text:p>
          </table:table-cell>
          <table:table-cell table:formula="of:=SUMPRODUCT(([$Transactions.$C$3:.$C$102]=&quot;Savings/Investments&quot;)*(MONTH([$Transactions.$A$3:.$A$102])=8)*[$Transactions.$E$3:.$E$102])" office:value-type="float" office:value="104.3" calcext:value-type="float">
            <text:p>$104.30</text:p>
          </table:table-cell>
          <table:table-cell table:formula="of:=SUMPRODUCT(([$Transactions.$C$3:.$C$102]=&quot;Savings/Investments&quot;)*(MONTH([$Transactions.$A$3:.$A$102])=9)*[$Transactions.$E$3:.$E$102])" office:value-type="float" office:value="0" calcext:value-type="float">
            <text:p>$0.00</text:p>
          </table:table-cell>
          <table:table-cell table:formula="of:=SUMPRODUCT(([$Transactions.$C$3:.$C$102]=&quot;Savings/Investments&quot;)*(MONTH([$Transactions.$A$3:.$A$102])=10)*[$Transactions.$E$3:.$E$102])" office:value-type="float" office:value="277.97" calcext:value-type="float">
            <text:p>$277.97</text:p>
          </table:table-cell>
          <table:table-cell table:formula="of:=SUMPRODUCT(([$Transactions.$C$3:.$C$102]=&quot;Savings/Investments&quot;)*(MONTH([$Transactions.$A$3:.$A$102])=11)*[$Transactions.$E$3:.$E$102])" office:value-type="float" office:value="136.6" calcext:value-type="float">
            <text:p>$136.60</text:p>
          </table:table-cell>
          <table:table-cell table:formula="of:=SUMPRODUCT(([$Transactions.$C$3:.$C$102]=&quot;Savings/Investments&quot;)*(MONTH([$Transactions.$A$3:.$A$102])=12)*[$Transactions.$E$3:.$E$102])" office:value-type="float" office:value="0" calcext:value-type="float">
            <text:p>$0.00</text:p>
          </table:table-cell>
          <table:table-cell table:formula="of:=SUM([.B22:.M22])" office:value-type="float" office:value="1693.96" calcext:value-type="float">
            <text:p>$1,693.96</text:p>
          </table:table-cell>
          <table:table-cell/>
          <table:table-cell table:style-name="Default" table:number-columns-repeated="16369"/>
        </table:table-row>
        <table:table-row table:style-name="ro3">
          <table:table-cell office:value-type="string" calcext:value-type="string">
            <text:p>Miscellaneous</text:p>
          </table:table-cell>
          <table:table-cell table:formula="of:=SUMPRODUCT(([$Transactions.$C$3:.$C$102]=&quot;Miscellaneous&quot;)*(MONTH([$Transactions.$A$3:.$A$102])=1)*[$Transactions.$E$3:.$E$102])" office:value-type="float" office:value="0" calcext:value-type="float">
            <text:p>$0.00</text:p>
          </table:table-cell>
          <table:table-cell table:formula="of:=SUMPRODUCT(([$Transactions.$C$3:.$C$102]=&quot;Miscellaneous&quot;)*(MONTH([$Transactions.$A$3:.$A$102])=2)*[$Transactions.$E$3:.$E$102])" office:value-type="float" office:value="34.05" calcext:value-type="float">
            <text:p>$34.05</text:p>
          </table:table-cell>
          <table:table-cell table:formula="of:=SUMPRODUCT(([$Transactions.$C$3:.$C$102]=&quot;Miscellaneous&quot;)*(MONTH([$Transactions.$A$3:.$A$102])=3)*[$Transactions.$E$3:.$E$102])" office:value-type="float" office:value="0" calcext:value-type="float">
            <text:p>$0.00</text:p>
          </table:table-cell>
          <table:table-cell table:formula="of:=SUMPRODUCT(([$Transactions.$C$3:.$C$102]=&quot;Miscellaneous&quot;)*(MONTH([$Transactions.$A$3:.$A$102])=4)*[$Transactions.$E$3:.$E$102])" office:value-type="float" office:value="24.09" calcext:value-type="float">
            <text:p>$24.09</text:p>
          </table:table-cell>
          <table:table-cell table:formula="of:=SUMPRODUCT(([$Transactions.$C$3:.$C$102]=&quot;Miscellaneous&quot;)*(MONTH([$Transactions.$A$3:.$A$102])=5)*[$Transactions.$E$3:.$E$102])" office:value-type="float" office:value="50.46" calcext:value-type="float">
            <text:p>$50.46</text:p>
          </table:table-cell>
          <table:table-cell table:formula="of:=SUMPRODUCT(([$Transactions.$C$3:.$C$102]=&quot;Miscellaneous&quot;)*(MONTH([$Transactions.$A$3:.$A$102])=6)*[$Transactions.$E$3:.$E$102])" office:value-type="float" office:value="47.56" calcext:value-type="float">
            <text:p>$47.56</text:p>
          </table:table-cell>
          <table:table-cell table:formula="of:=SUMPRODUCT(([$Transactions.$C$3:.$C$102]=&quot;Miscellaneous&quot;)*(MONTH([$Transactions.$A$3:.$A$102])=7)*[$Transactions.$E$3:.$E$102])" office:value-type="float" office:value="0" calcext:value-type="float">
            <text:p>$0.00</text:p>
          </table:table-cell>
          <table:table-cell table:formula="of:=SUMPRODUCT(([$Transactions.$C$3:.$C$102]=&quot;Miscellaneous&quot;)*(MONTH([$Transactions.$A$3:.$A$102])=8)*[$Transactions.$E$3:.$E$102])" office:value-type="float" office:value="0" calcext:value-type="float">
            <text:p>$0.00</text:p>
          </table:table-cell>
          <table:table-cell table:formula="of:=SUMPRODUCT(([$Transactions.$C$3:.$C$102]=&quot;Miscellaneous&quot;)*(MONTH([$Transactions.$A$3:.$A$102])=9)*[$Transactions.$E$3:.$E$102])" office:value-type="float" office:value="35.9" calcext:value-type="float">
            <text:p>$35.90</text:p>
          </table:table-cell>
          <table:table-cell table:formula="of:=SUMPRODUCT(([$Transactions.$C$3:.$C$102]=&quot;Miscellaneous&quot;)*(MONTH([$Transactions.$A$3:.$A$102])=10)*[$Transactions.$E$3:.$E$102])" office:value-type="float" office:value="0" calcext:value-type="float">
            <text:p>$0.00</text:p>
          </table:table-cell>
          <table:table-cell table:formula="of:=SUMPRODUCT(([$Transactions.$C$3:.$C$102]=&quot;Miscellaneous&quot;)*(MONTH([$Transactions.$A$3:.$A$102])=11)*[$Transactions.$E$3:.$E$102])" office:value-type="float" office:value="0" calcext:value-type="float">
            <text:p>$0.00</text:p>
          </table:table-cell>
          <table:table-cell table:formula="of:=SUMPRODUCT(([$Transactions.$C$3:.$C$102]=&quot;Miscellaneous&quot;)*(MONTH([$Transactions.$A$3:.$A$102])=12)*[$Transactions.$E$3:.$E$102])" office:value-type="float" office:value="18.87" calcext:value-type="float">
            <text:p>$18.87</text:p>
          </table:table-cell>
          <table:table-cell table:formula="of:=SUM([.B23:.M23])" office:value-type="float" office:value="210.93" calcext:value-type="float">
            <text:p>$210.93</text:p>
          </table:table-cell>
          <table:table-cell/>
          <table:table-cell table:style-name="Default" table:number-columns-repeated="16369"/>
        </table:table-row>
        <table:table-row table:style-name="ro3">
          <table:table-cell table:style-name="ce14" office:value-type="string" calcext:value-type="string">
            <text:p>Total Expenses</text:p>
          </table:table-cell>
          <table:table-cell table:style-name="ce17" table:formula="of:=SUM([.B12];[.B13];[.B14];[.B15];[.B16];[.B17];[.B18];[.B19];[.B20];[.B21];[.B22];[.B23])" office:value-type="float" office:value="1435.14" calcext:value-type="float">
            <text:p>$1,435.14</text:p>
          </table:table-cell>
          <table:table-cell table:style-name="ce17" table:formula="of:=SUM([.C12];[.C13];[.C14];[.C15];[.C16];[.C17];[.C18];[.C19];[.C20];[.C21];[.C22];[.C23])" office:value-type="float" office:value="1590.35" calcext:value-type="float">
            <text:p>$1,590.35</text:p>
          </table:table-cell>
          <table:table-cell table:style-name="ce17" table:formula="of:=SUM([.D12];[.D13];[.D14];[.D15];[.D16];[.D17];[.D18];[.D19];[.D20];[.D21];[.D22];[.D23])" office:value-type="float" office:value="1077.43" calcext:value-type="float">
            <text:p>$1,077.43</text:p>
          </table:table-cell>
          <table:table-cell table:style-name="ce17" table:formula="of:=SUM([.E12];[.E13];[.E14];[.E15];[.E16];[.E17];[.E18];[.E19];[.E20];[.E21];[.E22];[.E23])" office:value-type="float" office:value="572.64" calcext:value-type="float">
            <text:p>$572.64</text:p>
          </table:table-cell>
          <table:table-cell table:style-name="ce17" table:formula="of:=SUM([.F12];[.F13];[.F14];[.F15];[.F16];[.F17];[.F18];[.F19];[.F20];[.F21];[.F22];[.F23])" office:value-type="float" office:value="822.57" calcext:value-type="float">
            <text:p>$822.57</text:p>
          </table:table-cell>
          <table:table-cell table:style-name="ce17" table:formula="of:=SUM([.G12];[.G13];[.G14];[.G15];[.G16];[.G17];[.G18];[.G19];[.G20];[.G21];[.G22];[.G23])" office:value-type="float" office:value="1354.46" calcext:value-type="float">
            <text:p>$1,354.46</text:p>
          </table:table-cell>
          <table:table-cell table:style-name="ce17" table:formula="of:=SUM([.H12];[.H13];[.H14];[.H15];[.H16];[.H17];[.H18];[.H19];[.H20];[.H21];[.H22];[.H23])" office:value-type="float" office:value="1736.9" calcext:value-type="float">
            <text:p>$1,736.90</text:p>
          </table:table-cell>
          <table:table-cell table:style-name="ce17" table:formula="of:=SUM([.I12];[.I13];[.I14];[.I15];[.I16];[.I17];[.I18];[.I19];[.I20];[.I21];[.I22];[.I23])" office:value-type="float" office:value="402.82" calcext:value-type="float">
            <text:p>$402.82</text:p>
          </table:table-cell>
          <table:table-cell table:style-name="ce17" table:formula="of:=SUM([.J12];[.J13];[.J14];[.J15];[.J16];[.J17];[.J18];[.J19];[.J20];[.J21];[.J22];[.J23])" office:value-type="float" office:value="170.32" calcext:value-type="float">
            <text:p>$170.32</text:p>
          </table:table-cell>
          <table:table-cell table:style-name="ce17" table:formula="of:=SUM([.K12];[.K13];[.K14];[.K15];[.K16];[.K17];[.K18];[.K19];[.K20];[.K21];[.K22];[.K23])" office:value-type="float" office:value="811.57" calcext:value-type="float">
            <text:p>$811.57</text:p>
          </table:table-cell>
          <table:table-cell table:style-name="ce17" table:formula="of:=SUM([.L12];[.L13];[.L14];[.L15];[.L16];[.L17];[.L18];[.L19];[.L20];[.L21];[.L22];[.L23])" office:value-type="float" office:value="338.46" calcext:value-type="float">
            <text:p>$338.46</text:p>
          </table:table-cell>
          <table:table-cell table:style-name="ce17" table:formula="of:=SUM([.M12];[.M13];[.M14];[.M15];[.M16];[.M17];[.M18];[.M19];[.M20];[.M21];[.M22];[.M23])" office:value-type="float" office:value="236.79" calcext:value-type="float">
            <text:p>$236.79</text:p>
          </table:table-cell>
          <table:table-cell table:style-name="ce17" table:formula="of:=SUM([.B24:.M24])" office:value-type="float" office:value="10549.45" calcext:value-type="float">
            <text:p>$10,549.45</text:p>
          </table:table-cell>
          <table:table-cell/>
          <table:table-cell table:style-name="Default" table:number-columns-repeated="16369"/>
        </table:table-row>
        <table:table-row table:style-name="ro3">
          <table:table-cell table:style-name="Default" table:number-columns-repeated="14"/>
          <table:table-cell/>
          <table:table-cell table:style-name="Default" table:number-columns-repeated="16369"/>
        </table:table-row>
        <table:table-row table:style-name="ro3">
          <table:table-cell table:style-name="ce16" office:value-type="string" calcext:value-type="string">
            <text:p>Net Balance (Income − Expenses)</text:p>
          </table:table-cell>
          <table:table-cell table:style-name="ce18" table:formula="of:=[.B9]-[.B24]" office:value-type="float" office:value="-1080.63" calcext:value-type="float">
            <text:p>-$1,080.63</text:p>
          </table:table-cell>
          <table:table-cell table:style-name="ce18" table:formula="of:=[.C9]-[.C24]" office:value-type="float" office:value="2474.62" calcext:value-type="float">
            <text:p>$2,474.62</text:p>
          </table:table-cell>
          <table:table-cell table:style-name="ce18" table:formula="of:=[.D9]-[.D24]" office:value-type="float" office:value="-1077.43" calcext:value-type="float">
            <text:p>-$1,077.43</text:p>
          </table:table-cell>
          <table:table-cell table:style-name="ce18" table:formula="of:=[.E9]-[.E24]" office:value-type="float" office:value="-572.64" calcext:value-type="float">
            <text:p>-$572.64</text:p>
          </table:table-cell>
          <table:table-cell table:style-name="ce18" table:formula="of:=[.F9]-[.F24]" office:value-type="float" office:value="2515.1" calcext:value-type="float">
            <text:p>$2,515.10</text:p>
          </table:table-cell>
          <table:table-cell table:style-name="ce18" table:formula="of:=[.G9]-[.G24]" office:value-type="float" office:value="-1354.46" calcext:value-type="float">
            <text:p>-$1,354.46</text:p>
          </table:table-cell>
          <table:table-cell table:style-name="ce18" table:formula="of:=[.H9]-[.H24]" office:value-type="float" office:value="-1183.02" calcext:value-type="float">
            <text:p>-$1,183.02</text:p>
          </table:table-cell>
          <table:table-cell table:style-name="ce18" table:formula="of:=[.I9]-[.I24]" office:value-type="float" office:value="-367.06" calcext:value-type="float">
            <text:p>-$367.06</text:p>
          </table:table-cell>
          <table:table-cell table:style-name="ce18" table:formula="of:=[.J9]-[.J24]" office:value-type="float" office:value="70.79" calcext:value-type="float">
            <text:p>$70.79</text:p>
          </table:table-cell>
          <table:table-cell table:style-name="ce18" table:formula="of:=[.K9]-[.K24]" office:value-type="float" office:value="-513.08" calcext:value-type="float">
            <text:p>-$513.08</text:p>
          </table:table-cell>
          <table:table-cell table:style-name="ce18" table:formula="of:=[.L9]-[.L24]" office:value-type="float" office:value="-318.66" calcext:value-type="float">
            <text:p>-$318.66</text:p>
          </table:table-cell>
          <table:table-cell table:style-name="ce18" table:formula="of:=[.M9]-[.M24]" office:value-type="float" office:value="427.05" calcext:value-type="float">
            <text:p>$427.05</text:p>
          </table:table-cell>
          <table:table-cell table:style-name="ce18" table:formula="of:=[.N9]-[.N24]" office:value-type="float" office:value="-979.42" calcext:value-type="float">
            <text:p>-$979.42</text:p>
          </table:table-cell>
          <table:table-cell/>
          <table:table-cell table:style-name="Default" table:number-columns-repeated="16369"/>
        </table:table-row>
      </table:table>
      <table:table table:name="Analysis" table:style-name="ta3">
        <table:table-column table:style-name="co8" table:default-cell-style-name="ce21"/>
        <table:table-column table:style-name="co9" table:default-cell-style-name="ce25"/>
        <table:table-column table:style-name="co10" table:default-cell-style-name="ce25"/>
        <table:table-column table:style-name="co1" table:default-cell-style-name="Default"/>
        <table:table-column table:style-name="co5" table:number-columns-repeated="2" table:default-cell-style-name="Default"/>
        <table:table-column table:style-name="co5" table:number-columns-repeated="16378"/>
        <table:table-row table:style-name="ro1">
          <table:table-cell table:style-name="ce1" office:value-type="string" calcext:value-type="string" table:number-columns-spanned="6" table:number-rows-spanned="1">
            <text:p>Personal Budget — Analysis</text:p>
          </table:table-cell>
          <table:covered-table-cell table:number-columns-repeated="2" table:style-name="Default"/>
          <table:covered-table-cell table:number-columns-repeated="3"/>
          <table:table-cell table:style-name="Default" table:number-columns-repeated="16378"/>
        </table:table-row>
        <table:table-row table:style-name="ro3">
          <table:table-cell table:style-name="Default" table:number-columns-repeated="3"/>
          <table:table-cell table:number-columns-repeated="3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Total Income</text:p>
          </table:table-cell>
          <table:table-cell table:style-name="ce2" office:value-type="string" calcext:value-type="string">
            <text:p>Total Expenses</text:p>
          </table:table-cell>
          <table:table-cell table:style-name="ce2" office:value-type="string" calcext:value-type="string">
            <text:p>Net Balance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calcext:value-type="string">
            <text:p>Jan</text:p>
          </table:table-cell>
          <table:table-cell table:formula="of:=[$'Data Collection'.B9]" office:value-type="float" office:value="354.51" calcext:value-type="float">
            <text:p>$354.51</text:p>
          </table:table-cell>
          <table:table-cell table:formula="of:=[$'Data Collection'.B24]" office:value-type="float" office:value="1435.14" calcext:value-type="float">
            <text:p>$1,435.14</text:p>
          </table:table-cell>
          <table:table-cell table:style-name="ce29" table:formula="of:=[.B4]-[.C4]" office:value-type="float" office:value="-1080.63" calcext:value-type="float">
            <text:p>-$1,080.63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calcext:value-type="string">
            <text:p>Feb</text:p>
          </table:table-cell>
          <table:table-cell table:formula="of:=[$'Data Collection'.C9]" office:value-type="float" office:value="4064.97" calcext:value-type="float">
            <text:p>$4,064.97</text:p>
          </table:table-cell>
          <table:table-cell table:formula="of:=[$'Data Collection'.C24]" office:value-type="float" office:value="1590.35" calcext:value-type="float">
            <text:p>$1,590.35</text:p>
          </table:table-cell>
          <table:table-cell table:style-name="ce29" table:formula="of:=[.B5]-[.C5]" office:value-type="float" office:value="2474.62" calcext:value-type="float">
            <text:p>$2,474.62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calcext:value-type="string">
            <text:p>Mar</text:p>
          </table:table-cell>
          <table:table-cell table:formula="of:=[$'Data Collection'.D9]" office:value-type="float" office:value="0" calcext:value-type="float">
            <text:p>$0.00</text:p>
          </table:table-cell>
          <table:table-cell table:formula="of:=[$'Data Collection'.D24]" office:value-type="float" office:value="1077.43" calcext:value-type="float">
            <text:p>$1,077.43</text:p>
          </table:table-cell>
          <table:table-cell table:style-name="ce29" table:formula="of:=[.B6]-[.C6]" office:value-type="float" office:value="-1077.43" calcext:value-type="float">
            <text:p>-$1,077.43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calcext:value-type="string">
            <text:p>Apr</text:p>
          </table:table-cell>
          <table:table-cell table:formula="of:=[$'Data Collection'.E9]" office:value-type="float" office:value="0" calcext:value-type="float">
            <text:p>$0.00</text:p>
          </table:table-cell>
          <table:table-cell table:formula="of:=[$'Data Collection'.E24]" office:value-type="float" office:value="572.64" calcext:value-type="float">
            <text:p>$572.64</text:p>
          </table:table-cell>
          <table:table-cell table:style-name="ce29" table:formula="of:=[.B7]-[.C7]" office:value-type="float" office:value="-572.64" calcext:value-type="float">
            <text:p>-$572.64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calcext:value-type="string">
            <text:p>May</text:p>
          </table:table-cell>
          <table:table-cell table:formula="of:=[$'Data Collection'.F9]" office:value-type="float" office:value="3337.67" calcext:value-type="float">
            <text:p>$3,337.67</text:p>
          </table:table-cell>
          <table:table-cell table:formula="of:=[$'Data Collection'.F24]" office:value-type="float" office:value="822.57" calcext:value-type="float">
            <text:p>$822.57</text:p>
          </table:table-cell>
          <table:table-cell table:style-name="ce29" table:formula="of:=[.B8]-[.C8]" office:value-type="float" office:value="2515.1" calcext:value-type="float">
            <text:p>$2,515.10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calcext:value-type="string">
            <text:p>Jun</text:p>
          </table:table-cell>
          <table:table-cell table:formula="of:=[$'Data Collection'.G9]" office:value-type="float" office:value="0" calcext:value-type="float">
            <text:p>$0.00</text:p>
          </table:table-cell>
          <table:table-cell table:formula="of:=[$'Data Collection'.G24]" office:value-type="float" office:value="1354.46" calcext:value-type="float">
            <text:p>$1,354.46</text:p>
          </table:table-cell>
          <table:table-cell table:style-name="ce29" table:formula="of:=[.B9]-[.C9]" office:value-type="float" office:value="-1354.46" calcext:value-type="float">
            <text:p>-$1,354.46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calcext:value-type="string">
            <text:p>Jul</text:p>
          </table:table-cell>
          <table:table-cell table:formula="of:=[$'Data Collection'.H9]" office:value-type="float" office:value="553.88" calcext:value-type="float">
            <text:p>$553.88</text:p>
          </table:table-cell>
          <table:table-cell table:formula="of:=[$'Data Collection'.H24]" office:value-type="float" office:value="1736.9" calcext:value-type="float">
            <text:p>$1,736.90</text:p>
          </table:table-cell>
          <table:table-cell table:style-name="ce29" table:formula="of:=[.B10]-[.C10]" office:value-type="float" office:value="-1183.02" calcext:value-type="float">
            <text:p>-$1,183.02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calcext:value-type="string">
            <text:p>Aug</text:p>
          </table:table-cell>
          <table:table-cell table:formula="of:=[$'Data Collection'.I9]" office:value-type="float" office:value="35.76" calcext:value-type="float">
            <text:p>$35.76</text:p>
          </table:table-cell>
          <table:table-cell table:formula="of:=[$'Data Collection'.I24]" office:value-type="float" office:value="402.82" calcext:value-type="float">
            <text:p>$402.82</text:p>
          </table:table-cell>
          <table:table-cell table:style-name="ce29" table:formula="of:=[.B11]-[.C11]" office:value-type="float" office:value="-367.06" calcext:value-type="float">
            <text:p>-$367.06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calcext:value-type="string">
            <text:p>Sep</text:p>
          </table:table-cell>
          <table:table-cell table:formula="of:=[$'Data Collection'.J9]" office:value-type="float" office:value="241.11" calcext:value-type="float">
            <text:p>$241.11</text:p>
          </table:table-cell>
          <table:table-cell table:formula="of:=[$'Data Collection'.J24]" office:value-type="float" office:value="170.32" calcext:value-type="float">
            <text:p>$170.32</text:p>
          </table:table-cell>
          <table:table-cell table:style-name="ce29" table:formula="of:=[.B12]-[.C12]" office:value-type="float" office:value="70.79" calcext:value-type="float">
            <text:p>$70.79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calcext:value-type="string">
            <text:p>Oct</text:p>
          </table:table-cell>
          <table:table-cell table:formula="of:=[$'Data Collection'.K9]" office:value-type="float" office:value="298.49" calcext:value-type="float">
            <text:p>$298.49</text:p>
          </table:table-cell>
          <table:table-cell table:formula="of:=[$'Data Collection'.K24]" office:value-type="float" office:value="811.57" calcext:value-type="float">
            <text:p>$811.57</text:p>
          </table:table-cell>
          <table:table-cell table:style-name="ce29" table:formula="of:=[.B13]-[.C13]" office:value-type="float" office:value="-513.08" calcext:value-type="float">
            <text:p>-$513.08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calcext:value-type="string">
            <text:p>Nov</text:p>
          </table:table-cell>
          <table:table-cell table:formula="of:=[$'Data Collection'.L9]" office:value-type="float" office:value="19.8" calcext:value-type="float">
            <text:p>$19.80</text:p>
          </table:table-cell>
          <table:table-cell table:formula="of:=[$'Data Collection'.L24]" office:value-type="float" office:value="338.46" calcext:value-type="float">
            <text:p>$338.46</text:p>
          </table:table-cell>
          <table:table-cell table:style-name="ce29" table:formula="of:=[.B14]-[.C14]" office:value-type="float" office:value="-318.66" calcext:value-type="float">
            <text:p>-$318.66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calcext:value-type="string">
            <text:p>Dec</text:p>
          </table:table-cell>
          <table:table-cell table:formula="of:=[$'Data Collection'.M9]" office:value-type="float" office:value="663.84" calcext:value-type="float">
            <text:p>$663.84</text:p>
          </table:table-cell>
          <table:table-cell table:formula="of:=[$'Data Collection'.M24]" office:value-type="float" office:value="236.79" calcext:value-type="float">
            <text:p>$236.79</text:p>
          </table:table-cell>
          <table:table-cell table:style-name="ce29" table:formula="of:=[.B15]-[.C15]" office:value-type="float" office:value="427.05" calcext:value-type="float">
            <text:p>$427.05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table:style-name="ce22" office:value-type="string" calcext:value-type="string">
            <text:p>Year Total</text:p>
          </table:table-cell>
          <table:table-cell table:style-name="ce17" table:formula="of:=SUM([.B4:.B15])" office:value-type="float" office:value="9570.03" calcext:value-type="float">
            <text:p>$9,570.03</text:p>
          </table:table-cell>
          <table:table-cell table:style-name="ce17" table:formula="of:=SUM([.C4:.C15])" office:value-type="float" office:value="10549.45" calcext:value-type="float">
            <text:p>$10,549.45</text:p>
          </table:table-cell>
          <table:table-cell table:style-name="ce17" table:formula="of:=SUM([.D4:.D15])" office:value-type="float" office:value="-979.42" calcext:value-type="float">
            <text:p>-$979.42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table:style-name="Default" table:number-columns-repeated="3"/>
          <table:table-cell table:number-columns-repeated="3"/>
          <table:table-cell table:style-name="Default" table:number-columns-repeated="16378"/>
        </table:table-row>
        <table:table-row table:style-name="ro2">
          <table:table-cell table:style-name="ce23" office:value-type="string" calcext:value-type="string" table:number-columns-spanned="4" table:number-rows-spanned="1">
            <text:p>Annual Expense Breakdown by Category</text:p>
          </table:table-cell>
          <table:covered-table-cell table:number-columns-repeated="2" table:style-name="Default"/>
          <table:covered-table-cell/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nnual Total</text:p>
          </table:table-cell>
          <table:table-cell table:style-name="ce2" office:value-type="string" calcext:value-type="string">
            <text:p>% of Total Expenses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calcext:value-type="string">
            <text:p>Housing (Rent/Mortgage)</text:p>
          </table:table-cell>
          <table:table-cell table:style-name="ce10" table:formula="of:=[$'Data Collection'.N12]" office:value-type="float" office:value="4851.89" calcext:value-type="float">
            <text:p>$4,851.89</text:p>
          </table:table-cell>
          <table:table-cell table:style-name="ce28" table:formula="of:=IFERROR([.B20]/SUM([.B20:.B31]);0)" office:value-type="percentage" office:value="0.459918763537436" calcext:value-type="percentage">
            <text:p>46.0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calcext:value-type="string">
            <text:p>Utilities</text:p>
          </table:table-cell>
          <table:table-cell table:style-name="ce10" table:formula="of:=[$'Data Collection'.N13]" office:value-type="float" office:value="625.52" calcext:value-type="float">
            <text:p>$625.52</text:p>
          </table:table-cell>
          <table:table-cell table:style-name="ce28" table:formula="of:=IFERROR([.B21]/SUM([.B20:.B31]);0)" office:value-type="percentage" office:value="0.059294086421567" calcext:value-type="percentage">
            <text:p>5.9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calcext:value-type="string">
            <text:p>Groceries</text:p>
          </table:table-cell>
          <table:table-cell table:style-name="ce10" table:formula="of:=[$'Data Collection'.N14]" office:value-type="float" office:value="204.24" calcext:value-type="float">
            <text:p>$204.24</text:p>
          </table:table-cell>
          <table:table-cell table:style-name="ce28" table:formula="of:=IFERROR([.B22]/SUM([.B20:.B31]);0)" office:value-type="percentage" office:value="0.0193602510083464" calcext:value-type="percentage">
            <text:p>1.9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calcext:value-type="string">
            <text:p>Transportation</text:p>
          </table:table-cell>
          <table:table-cell table:style-name="ce10" table:formula="of:=[$'Data Collection'.N15]" office:value-type="float" office:value="390.31" calcext:value-type="float">
            <text:p>$390.31</text:p>
          </table:table-cell>
          <table:table-cell table:style-name="ce28" table:formula="of:=IFERROR([.B23]/SUM([.B20:.B31]);0)" office:value-type="percentage" office:value="0.036998137343653" calcext:value-type="percentage">
            <text:p>3.7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calcext:value-type="string">
            <text:p>Insurance</text:p>
          </table:table-cell>
          <table:table-cell table:style-name="ce10" table:formula="of:=[$'Data Collection'.N16]" office:value-type="float" office:value="1128.36" calcext:value-type="float">
            <text:p>$1,128.36</text:p>
          </table:table-cell>
          <table:table-cell table:style-name="ce28" table:formula="of:=IFERROR([.B24]/SUM([.B20:.B31]);0)" office:value-type="percentage" office:value="0.106959130570788" calcext:value-type="percentage">
            <text:p>10.7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calcext:value-type="string">
            <text:p>Healthcare</text:p>
          </table:table-cell>
          <table:table-cell table:style-name="ce10" table:formula="of:=[$'Data Collection'.N17]" office:value-type="float" office:value="536.31" calcext:value-type="float">
            <text:p>$536.31</text:p>
          </table:table-cell>
          <table:table-cell table:style-name="ce28" table:formula="of:=IFERROR([.B25]/SUM([.B20:.B31]);0)" office:value-type="percentage" office:value="0.050837721397798" calcext:value-type="percentage">
            <text:p>5.1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calcext:value-type="string">
            <text:p>Dining Out</text:p>
          </table:table-cell>
          <table:table-cell table:style-name="ce10" table:formula="of:=[$'Data Collection'.N18]" office:value-type="float" office:value="121.88" calcext:value-type="float">
            <text:p>$121.88</text:p>
          </table:table-cell>
          <table:table-cell table:style-name="ce28" table:formula="of:=IFERROR([.B26]/SUM([.B20:.B31]);0)" office:value-type="percentage" office:value="0.011553208935063" calcext:value-type="percentage">
            <text:p>1.2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calcext:value-type="string">
            <text:p>Entertainment</text:p>
          </table:table-cell>
          <table:table-cell table:style-name="ce10" table:formula="of:=[$'Data Collection'.N19]" office:value-type="float" office:value="390.43" calcext:value-type="float">
            <text:p>$390.43</text:p>
          </table:table-cell>
          <table:table-cell table:style-name="ce28" table:formula="of:=IFERROR([.B27]/SUM([.B20:.B31]);0)" office:value-type="percentage" office:value="0.0370095123442454" calcext:value-type="percentage">
            <text:p>3.7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calcext:value-type="string">
            <text:p>Clothing</text:p>
          </table:table-cell>
          <table:table-cell table:style-name="ce10" table:formula="of:=[$'Data Collection'.N20]" office:value-type="float" office:value="301.62" calcext:value-type="float">
            <text:p>$301.62</text:p>
          </table:table-cell>
          <table:table-cell table:style-name="ce28" table:formula="of:=IFERROR([.B28]/SUM([.B20:.B31]);0)" office:value-type="percentage" office:value="0.0285910639891179" calcext:value-type="percentage">
            <text:p>2.9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calcext:value-type="string">
            <text:p>Subscriptions</text:p>
          </table:table-cell>
          <table:table-cell table:style-name="ce10" table:formula="of:=[$'Data Collection'.N21]" office:value-type="float" office:value="94" calcext:value-type="float">
            <text:p>$94.00</text:p>
          </table:table-cell>
          <table:table-cell table:style-name="ce28" table:formula="of:=IFERROR([.B29]/SUM([.B20:.B31]);0)" office:value-type="percentage" office:value="0.00891041713075089" calcext:value-type="percentage">
            <text:p>0.9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calcext:value-type="string">
            <text:p>Savings/Investments</text:p>
          </table:table-cell>
          <table:table-cell table:style-name="ce10" table:formula="of:=[$'Data Collection'.N22]" office:value-type="float" office:value="1693.96" calcext:value-type="float">
            <text:p>$1,693.96</text:p>
          </table:table-cell>
          <table:table-cell table:style-name="ce28" table:formula="of:=IFERROR([.B30]/SUM([.B20:.B31]);0)" office:value-type="percentage" office:value="0.160573300029859" calcext:value-type="percentage">
            <text:p>16.1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6" office:value-type="string" calcext:value-type="string">
            <text:p>Miscellaneous</text:p>
          </table:table-cell>
          <table:table-cell table:style-name="ce10" table:formula="of:=[$'Data Collection'.N23]" office:value-type="float" office:value="210.93" calcext:value-type="float">
            <text:p>$210.93</text:p>
          </table:table-cell>
          <table:table-cell table:style-name="ce28" table:formula="of:=IFERROR([.B31]/SUM([.B20:.B31]);0)" office:value-type="percentage" office:value="0.0199944072913754" calcext:value-type="percentage">
            <text:p>2.0%</text:p>
          </table:table-cell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Default" table:number-columns-repeated="3"/>
          <table:table-cell table:number-columns-repeated="3"/>
          <table:table-cell table:style-name="Default" table:number-columns-repeated="16378"/>
        </table:table-row>
        <table:table-row table:style-name="ro2">
          <table:table-cell table:style-name="ce23" office:value-type="string" calcext:value-type="string" table:number-columns-spanned="4" table:number-rows-spanned="1">
            <text:p>Monthly Averages</text:p>
          </table:table-cell>
          <table:covered-table-cell table:number-columns-repeated="2" table:style-name="Default"/>
          <table:covered-table-cell/>
          <table:table-cell table:number-columns-repeated="2"/>
          <table:table-cell table:style-name="Default" table:number-columns-repeated="16378"/>
        </table:table-row>
        <table:table-row table:style-name="ro3">
          <table:table-cell table:style-name="ce24" office:value-type="string" calcext:value-type="string">
            <text:p>Avg Monthly Income</text:p>
          </table:table-cell>
          <table:table-cell table:style-name="ce26" table:formula="of:=AVERAGE([$'Data Collection'.B9:.M9])" office:value-type="float" office:value="797.5025" calcext:value-type="float">
            <text:p>$797.50</text:p>
          </table:table-cell>
          <table:table-cell table:style-name="Default"/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24" office:value-type="string" calcext:value-type="string">
            <text:p>Avg Monthly Expenses</text:p>
          </table:table-cell>
          <table:table-cell table:style-name="ce26" table:formula="of:=AVERAGE([$'Data Collection'.B24:.M24])" office:value-type="float" office:value="879.120833333333" calcext:value-type="float">
            <text:p>$879.12</text:p>
          </table:table-cell>
          <table:table-cell table:style-name="Default"/>
          <table:table-cell table:number-columns-repeated="3"/>
          <table:table-cell table:style-name="Default" table:number-columns-repeated="16378"/>
        </table:table-row>
        <table:table-row table:style-name="ro3">
          <table:table-cell table:style-name="ce24" office:value-type="string" calcext:value-type="string">
            <text:p>Savings Rate</text:p>
          </table:table-cell>
          <table:table-cell table:style-name="ce27" table:formula="of:=IFERROR((AVERAGE([$'Data Collection'.B9:.M9])-AVERAGE([$'Data Collection'.B24:.M24]))/AVERAGE([$'Data Collection'.B9:.M9]);0)" office:value-type="percentage" office:value="-0.102342416899425" calcext:value-type="percentage">
            <text:p>-10.2%</text:p>
          </table:table-cell>
          <table:table-cell table:style-name="Default"/>
          <table:table-cell table:number-columns-repeated="3"/>
          <table:table-cell table:style-name="Default" table:number-columns-repeated="16378"/>
        </table:table-row>
      </table:table>
      <table:table table:name="Data Visualizations" table:style-name="ta4">
        <table:table-column table:style-name="co5" table:number-columns-repeated="14" table:default-cell-style-name="Default"/>
        <table:table-column table:style-name="co5" table:number-columns-repeated="16370"/>
        <table:table-row table:style-name="ro1">
          <table:table-cell table:style-name="ce1" office:value-type="string" calcext:value-type="string" table:number-columns-spanned="14" table:number-rows-spanned="1">
            <text:p>Personal Budget — Data Visualizations</text:p>
          </table:table-cell>
          <table:covered-table-cell table:number-columns-repeated="13"/>
          <table:table-cell table:style-name="Default" table:number-columns-repeated="16370"/>
        </table:table-row>
        <table:table-row table:style-name="ro3">
          <table:table-cell table:number-columns-repeated="14"/>
          <table:table-cell table:style-name="Default" table:number-columns-repeated="16370"/>
        </table:table-row>
        <table:table-row table:style-name="ro3">
          <table:table-cell table:style-name="ce30" office:value-type="string" calcext:value-type="string">
            <text:p>Charts are generated from the Analysis sheet data.</text:p>
          </table:table-cell>
          <table:table-cell table:number-columns-repeated="13"/>
          <table:table-cell table:style-name="Default" table:number-columns-repeated="16370"/>
        </table:table-row>
        <table:table-row table:style-name="ro3">
          <table:table-cell table:style-name="ce30" office:value-type="string" calcext:value-type="string">
            <text:p>Tip: add transactions in the Transactions sheet — all charts update automatically.</text:p>
          </table:table-cell>
          <table:table-cell table:number-columns-repeated="13"/>
          <table:table-cell table:style-name="Default" table:number-columns-repeated="16370"/>
        </table:table-row>
        <table:table-row table:style-name="ro3">
          <table:table-cell table:number-columns-repeated="14"/>
          <table:table-cell table:style-name="Default" table:number-columns-repeated="16370"/>
        </table:table-row>
        <table:table-row table:style-name="ro3">
          <table:table-cell>
            <draw:frame draw:z-index="0" draw:name="Chart 1" draw:style-name="gr1" draw:text-style-name="P1" svg:width="7.8736in" svg:height="4.724in" svg:x="0in" svg:y="0in">
              <draw:object draw:notify-on-update-of-ranges="Analysis.A4:Analysis.A15 Analysis.B3:Analysis.B3 Analysis.B4:Analysis.B15 Analysis.C3:Analysis.C3 Analysis.C4:Analysis.C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draw:z-index="1" draw:name="Chart 2" draw:style-name="gr1" draw:text-style-name="P1" svg:width="7.8736in" svg:height="4.724in" svg:x="0in" svg:y="0in">
              <draw:object draw:notify-on-update-of-ranges="Analysis.A4:Analysis.A15 Analysis.D3:Analysis.D3 Analysis.D4:Analysis.D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 table:number-columns-repeated="16370"/>
        </table:table-row>
        <table:table-row table:style-name="ro3" table:number-rows-repeated="20">
          <table:table-cell table:number-columns-repeated="14"/>
          <table:table-cell table:style-name="Default" table:number-columns-repeated="16370"/>
        </table:table-row>
        <table:table-row table:style-name="ro3">
          <table:table-cell>
            <draw:frame draw:z-index="2" draw:name="Chart 3" draw:style-name="gr1" draw:text-style-name="P1" svg:width="7.8736in" svg:height="5.5114in" svg:x="0in" svg:y="0in">
              <draw:object draw:notify-on-update-of-ranges="Analysis.A21:Analysis.A32 Analysis.B20:Analysis.B20 Analysis.B21:Analysis.B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3"/>
          <table:table-cell table:style-name="Default" table:number-columns-repeated="16370"/>
        </table:table-row>
      </table:table>
      <table:named-expressions/>
      <table:database-ranges>
        <table:database-range table:name="__Anonymous_Sheet_DB__0" table:target-range-address="Transactions.A2:Transactions.E10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text>$</number:text>
      <number:number number:decimal-places="2" number:min-decimal-places="2" number:min-integer-digits="1" number:grouping="true"/>
    </number:number-style>
    <number:percentage-style style:name="N153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ansactions" style:display-name="PageStyle_Transa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20_Collection" style:display-name="PageStyle_Data Collec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20_Visualizations" style:display-name="PageStyle_Data Visualiz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alysis" style:display-name="PageStyle_Analys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6-29T00:38:20</meta:creation-date>
    <dc:date>2026-06-29T00:38:21</dc:date>
    <meta:generator>LibreOffice/26.2.4.2$Linux_X86_64 LibreOffice_project/620$Build-2</meta:generator>
    <meta:document-statistic meta:table-count="4" meta:cell-count="896" meta:object-count="3"/>
    <meta:user-defined meta:name="AppVersion">3.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52">
      <number:text>$</number:text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52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878787"/>
    </style:style>
    <style:style style:name="ch9" style:family="chart" style:data-style-name="N152">
      <style:chart-properties chart:link-data-style-to-source="true"/>
      <style:graphic-properties svg:stroke-width="0.035cm" svg:stroke-color="#f9f9f9" draw:fill-color="#1f7244"/>
      <style:text-properties fo:font-size="10pt" style:font-size-asian="10pt" style:font-size-complex="10pt"/>
    </style:style>
    <style:style style:name="ch10" style:family="chart" style:data-style-name="N152">
      <style:chart-properties chart:link-data-style-to-source="true"/>
      <style:graphic-properties svg:stroke-width="0.035cm" svg:stroke-color="#f9f9f9" draw:fill-color="#c0392b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</office:automatic-styles>
  <office:body>
    <office:chart>
      <chart:chart svg:width="20cm" svg:height="12cm" xlink:href=".." xlink:type="simple" chart:class="chart:bar" chart:style-name="ch1">
        <chart:title svg:x="6.075cm" svg:y="0.376cm" chart:style-name="ch2">
          <text:p><text:span text:style-name="T1">Monthly Income vs Expenses</text:span></text:p>
        </chart:title>
        <chart:legend chart:legend-position="end" svg:x="17.17cm" svg:y="5.505cm" style:legend-expansion="high" chart:style-name="ch3"/>
        <chart:plot-area chart:style-name="ch4" svg:x="1.407cm" svg:y="1.633cm" svg:width="15.363cm" svg:height="9.15cm">
          <chart:coordinate-region svg:x="2.901cm" svg:y="1.806cm" svg:width="13.869cm" svg:height="8.533cm"/>
          <chart:axis chart:dimension="x" chart:name="primary-x" chart:style-name="ch5" chartooo:axis-type="text">
            <chart:title svg:x="8.537cm" svg:y="11.023cm" chart:style-name="ch2">
              <text:p><text:span text:style-name="T2">Month</text:span></text:p>
            </chart:title>
            <chart:categories table:cell-range-address="Analysis.A4:Analysis.A15"/>
          </chart:axis>
          <chart:axis chart:dimension="y" chart:name="primary-y" chart:style-name="ch6">
            <chart:title svg:x="0.451cm" svg:y="7.086cm" chart:style-name="ch7">
              <text:p><text:span text:style-name="T2">Amount ($)</text:span></text:p>
            </chart:title>
            <chart:grid chart:style-name="ch8" chart:class="major"/>
          </chart:axis>
          <chart:series chart:style-name="ch9" chart:values-cell-range-address="Analysis.B4:Analysis.B15" chart:label-cell-address="Analysis.B3:Analysis.B3" chart:class="chart:bar">
            <chart:data-point chart:repeated="12"/>
          </chart:series>
          <chart:series chart:style-name="ch10" chart:values-cell-range-address="Analysis.C4:Analysis.C15" chart:label-cell-address="Analysis.C3:Analysis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Income</text:p>
                <draw:g>
                  <svg:desc>Analysis.B3:Analysis.B3</svg:desc>
                </draw:g>
              </table:table-cell>
              <table:table-cell office:value-type="string">
                <text:p>Total Expenses</text:p>
                <draw:g>
                  <svg:desc>Analysis.C3:Analysis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Analysis.A4:Analysis.A15</svg:desc>
                </draw:g>
              </table:table-cell>
              <table:table-cell office:value-type="float" office:value="354.51">
                <text:p>354.51</text:p>
                <draw:g>
                  <svg:desc>Analysis.B4:Analysis.B15</svg:desc>
                </draw:g>
              </table:table-cell>
              <table:table-cell office:value-type="float" office:value="1435.14">
                <text:p>1435.14</text:p>
                <draw:g>
                  <svg:desc>Analysis.C4:Analysis.C15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064.97">
                <text:p>4064.97</text:p>
              </table:table-cell>
              <table:table-cell office:value-type="float" office:value="1590.35">
                <text:p>1590.3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0">
                <text:p>0</text:p>
              </table:table-cell>
              <table:table-cell office:value-type="float" office:value="1077.43">
                <text:p>1077.4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0">
                <text:p>0</text:p>
              </table:table-cell>
              <table:table-cell office:value-type="float" office:value="572.64">
                <text:p>572.64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337.67">
                <text:p>3337.67</text:p>
              </table:table-cell>
              <table:table-cell office:value-type="float" office:value="822.57">
                <text:p>822.57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1354.46">
                <text:p>1354.4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553.88">
                <text:p>553.88</text:p>
              </table:table-cell>
              <table:table-cell office:value-type="float" office:value="1736.9">
                <text:p>1736.9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35.76">
                <text:p>35.76</text:p>
              </table:table-cell>
              <table:table-cell office:value-type="float" office:value="402.82">
                <text:p>402.82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41.11">
                <text:p>241.11</text:p>
              </table:table-cell>
              <table:table-cell office:value-type="float" office:value="170.32">
                <text:p>170.32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98.49">
                <text:p>298.49</text:p>
              </table:table-cell>
              <table:table-cell office:value-type="float" office:value="811.57">
                <text:p>811.57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9.8">
                <text:p>19.8</text:p>
              </table:table-cell>
              <table:table-cell office:value-type="float" office:value="338.46">
                <text:p>338.46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663.84">
                <text:p>663.84</text:p>
              </table:table-cell>
              <table:table-cell office:value-type="float" office:value="236.79">
                <text:p>236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52">
      <number:text>$</number:text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52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878787"/>
    </style:style>
    <style:style style:name="ch9" style:family="chart" style:data-style-name="N152">
      <style:chart-properties chart:link-data-style-to-source="true"/>
      <style:graphic-properties svg:stroke-width="0.035cm" svg:stroke-color="#f9f9f9" draw:fill-color="#2e75b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</office:automatic-styles>
  <office:body>
    <office:chart>
      <chart:chart svg:width="20cm" svg:height="12cm" xlink:href=".." xlink:type="simple" chart:class="chart:bar" chart:style-name="ch1">
        <chart:title svg:x="7.103cm" svg:y="0.376cm" chart:style-name="ch2">
          <text:p><text:span text:style-name="T1">Monthly Net Balance</text:span></text:p>
        </chart:title>
        <chart:legend chart:legend-position="end" svg:x="17.566cm" svg:y="5.727cm" style:legend-expansion="high" chart:style-name="ch3"/>
        <chart:plot-area chart:style-name="ch4" svg:x="1.407cm" svg:y="1.633cm" svg:width="15.759cm" svg:height="9.15cm">
          <chart:coordinate-region svg:x="3.006cm" svg:y="1.806cm" svg:width="14.16cm" svg:height="8.805cm"/>
          <chart:axis chart:dimension="x" chart:name="primary-x" chart:style-name="ch5" chartooo:axis-type="text">
            <chart:title svg:x="8.735cm" svg:y="11.023cm" chart:style-name="ch2">
              <text:p><text:span text:style-name="T2">Month</text:span></text:p>
            </chart:title>
            <chart:categories table:cell-range-address="Analysis.A4:Analysis.A15"/>
          </chart:axis>
          <chart:axis chart:dimension="y" chart:name="primary-y" chart:style-name="ch6">
            <chart:title svg:x="0.451cm" svg:y="7.086cm" chart:style-name="ch7">
              <text:p><text:span text:style-name="T2">Amount ($)</text:span></text:p>
            </chart:title>
            <chart:grid chart:style-name="ch8" chart:class="major"/>
          </chart:axis>
          <chart:series chart:style-name="ch9" chart:values-cell-range-address="Analysis.D4:Analysis.D15" chart:label-cell-address="Analysis.D3:Analysis.D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Balance</text:p>
                <draw:g>
                  <svg:desc>Analysis.D3:Analysi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Analysis.A4:Analysis.A15</svg:desc>
                </draw:g>
              </table:table-cell>
              <table:table-cell office:value-type="float" office:value="-1080.63">
                <text:p>-1080.63</text:p>
                <draw:g>
                  <svg:desc>Analysis.D4:Analysis.D15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474.62">
                <text:p>2474.62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-1077.43">
                <text:p>-1077.4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-572.64">
                <text:p>-572.64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515.1">
                <text:p>2515.1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-1354.46">
                <text:p>-1354.4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-1183.02">
                <text:p>-1183.02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-367.06">
                <text:p>-367.06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70.79">
                <text:p>70.79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-513.08">
                <text:p>-513.0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-318.66">
                <text:p>-318.66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427.05">
                <text:p>427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52">
      <number:text>$</number:text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52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52">
      <style:chart-properties chart:link-data-style-to-source="true"/>
      <style:graphic-properties svg:stroke-width="0.035cm" svg:stroke-color="#f9f9f9" draw:fill-color="#4f81bd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4672a8"/>
    </style:style>
    <style:style style:name="ch9" style:family="chart">
      <style:chart-properties chart:solid-type="cuboid"/>
      <style:graphic-properties draw:fill-color="#ab4744"/>
    </style:style>
    <style:style style:name="ch10" style:family="chart">
      <style:chart-properties chart:solid-type="cuboid"/>
      <style:graphic-properties draw:fill-color="#8aa64f"/>
    </style:style>
    <style:style style:name="ch11" style:family="chart">
      <style:chart-properties chart:solid-type="cuboid"/>
      <style:graphic-properties draw:fill-color="#725990"/>
    </style:style>
    <style:style style:name="ch12" style:family="chart">
      <style:chart-properties chart:solid-type="cuboid"/>
      <style:graphic-properties draw:fill-color="#4299b0"/>
    </style:style>
    <style:style style:name="ch13" style:family="chart">
      <style:chart-properties chart:solid-type="cuboid"/>
      <style:graphic-properties draw:fill-color="#dc853e"/>
    </style:style>
    <style:style style:name="ch14" style:family="chart">
      <style:chart-properties chart:solid-type="cuboid"/>
      <style:graphic-properties draw:fill-color="#93a9ce"/>
    </style:style>
    <style:style style:name="ch15" style:family="chart">
      <style:chart-properties chart:solid-type="cuboid"/>
      <style:graphic-properties draw:fill-color="#d09493"/>
    </style:style>
    <style:style style:name="ch16" style:family="chart">
      <style:chart-properties chart:solid-type="cuboid"/>
      <style:graphic-properties draw:fill-color="#b8cd97"/>
    </style:style>
    <style:style style:name="ch17" style:family="chart">
      <style:chart-properties chart:solid-type="cuboid"/>
      <style:graphic-properties draw:fill-color="#a99bbd"/>
    </style:style>
    <style:style style:name="ch18" style:family="chart">
      <style:chart-properties chart:solid-type="cuboid"/>
      <style:graphic-properties draw:fill-color="#92c3d5"/>
    </style:style>
    <style:style style:name="ch19" style:family="chart">
      <style:chart-properties chart:solid-type="cuboid"/>
      <style:graphic-properties draw:fill-color="#f8b590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</office:automatic-styles>
  <office:body>
    <office:chart>
      <chart:chart svg:width="20cm" svg:height="14cm" xlink:href=".." xlink:type="simple" chart:class="chart:circle" chart:style-name="ch1">
        <chart:title svg:x="6.208cm" svg:y="0.416cm" chart:style-name="ch2">
          <text:p><text:span text:style-name="T1">Annual Expense Breakdown</text:span></text:p>
        </chart:title>
        <chart:legend chart:legend-position="end" svg:x="16.358cm" svg:y="4.28cm" style:legend-expansion="high" chart:style-name="ch3"/>
        <chart:plot-area chart:style-name="ch4" svg:x="0.35cm" svg:y="1.783cm" svg:width="15.658cm" svg:height="11.867cm">
          <chart:coordinate-region svg:x="2.246cm" svg:y="1.784cm" svg:width="11.866cm" svg:height="11.866cm"/>
          <chart:axis chart:dimension="x" chart:name="primary-x" chart:style-name="ch5" chartooo:axis-type="text">
            <chart:categories table:cell-range-address="Analysis.A21:Analysis.A32"/>
          </chart:axis>
          <chart:axis chart:dimension="y" chart:name="primary-y" chart:style-name="ch6"/>
          <chart:series chart:style-name="ch7" chart:values-cell-range-address="Analysis.B21:Analysis.B32" chart:label-cell-address="Analysis.B20:Analysis.B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4,851.89</text:p>
                <draw:g>
                  <svg:desc>Analysis.B20:Analysis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tilities</text:p>
                <draw:g>
                  <svg:desc>Analysis.A21:Analysis.A32</svg:desc>
                </draw:g>
              </table:table-cell>
              <table:table-cell office:value-type="float" office:value="625.52">
                <text:p>625.52</text:p>
                <draw:g>
                  <svg:desc>Analysis.B21:Analysis.B32</svg:desc>
                </draw:g>
              </table:table-cell>
            </table:table-row>
            <table:table-row>
              <table:table-cell office:value-type="string">
                <text:p>Groceries</text:p>
              </table:table-cell>
              <table:table-cell office:value-type="float" office:value="204.24">
                <text:p>204.24</text:p>
              </table:table-cell>
            </table:table-row>
            <table:table-row>
              <table:table-cell office:value-type="string">
                <text:p>Transportation</text:p>
              </table:table-cell>
              <table:table-cell office:value-type="float" office:value="390.31">
                <text:p>390.31</text:p>
              </table:table-cell>
            </table:table-row>
            <table:table-row>
              <table:table-cell office:value-type="string">
                <text:p>Insurance</text:p>
              </table:table-cell>
              <table:table-cell office:value-type="float" office:value="1128.36">
                <text:p>1128.36</text:p>
              </table:table-cell>
            </table:table-row>
            <table:table-row>
              <table:table-cell office:value-type="string">
                <text:p>Healthcare</text:p>
              </table:table-cell>
              <table:table-cell office:value-type="float" office:value="536.31">
                <text:p>536.31</text:p>
              </table:table-cell>
            </table:table-row>
            <table:table-row>
              <table:table-cell office:value-type="string">
                <text:p>Dining Out</text:p>
              </table:table-cell>
              <table:table-cell office:value-type="float" office:value="121.88">
                <text:p>121.88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390.43">
                <text:p>390.43</text:p>
              </table:table-cell>
            </table:table-row>
            <table:table-row>
              <table:table-cell office:value-type="string">
                <text:p>Clothing</text:p>
              </table:table-cell>
              <table:table-cell office:value-type="float" office:value="301.62">
                <text:p>301.62</text:p>
              </table:table-cell>
            </table:table-row>
            <table:table-row>
              <table:table-cell office:value-type="string">
                <text:p>Subscriptions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Savings/Investments</text:p>
              </table:table-cell>
              <table:table-cell office:value-type="float" office:value="1693.96">
                <text:p>1693.96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210.93">
                <text:p>21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